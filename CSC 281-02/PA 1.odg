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4f81bd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1.59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16.93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53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Object_20_with_20_no_20_fill_20_and_20_no_20_line">
      <style:graphic-properties draw:stroke="solid" draw:fill="none" draw:fill-color="#729fcf" loext:fill-use-slide-background="false" draw:textarea-horizontal-align="center" draw:textarea-vertical-align="middle" draw:ole-draw-aspect="1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7cm" fo:padding-top="0cm" fo:padding-bottom="0cm" fo:padding-left="0cm" fo:padding-right="0cm" loext:decorative="false"/>
      <style:paragraph-properties style:writing-mode="lr-tb"/>
    </style:style>
    <style:style style:name="co1" style:family="table-column">
      <style:table-column-properties style:column-width="2.742cm" style:use-optimal-column-width="false"/>
    </style:style>
    <style:style style:name="co2" style:family="table-column">
      <style:table-column-properties style:column-width="2.745cm" style:use-optimal-column-width="false"/>
    </style:style>
    <style:style style:name="ro1" style:family="table-row">
      <style:table-row-properties style:row-height="0.981cm" style:use-optimal-row-height="false"/>
    </style:style>
    <style:style style:name="ro2" style:family="table-row">
      <style:table-row-properties style:row-height="1.008cm" style:use-optimal-row-height="false"/>
    </style:style>
    <style:style style:name="ro3" style:family="table-row">
      <style:table-row-properties style:row-height="1.011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ce3" style:family="table-cell">
      <loext:graphic-properties draw:textarea-vertical-align="middle"/>
      <style:paragraph-properties fo:text-align="center"/>
      <style:text-properties fo:font-size="11pt" style:font-size-asian="11pt" style:font-size-complex="11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6pt" style:font-size-asian="26pt" style:font-size-complex="26pt"/>
    </style:style>
    <style:style style:name="P3" style:family="paragraph">
      <loext:graphic-properties draw:fill="solid" draw:fill-color="#4f81bd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color="#000000" loext:opacity="100%" style:font-name="Calibri" fo:font-size="26pt" fo:font-weight="normal" style:font-name-asian="Calibri" style:font-size-asian="26pt" style:font-weight-asian="normal" style:font-name-complex="Calibri" style:font-size-complex="26pt" style:font-weight-complex="normal"/>
    </style:style>
    <style:style style:name="T2" style:family="text">
      <style:text-properties fo:color="#000000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3" style:family="text">
      <style:text-properties fo:color="#000000" loext:opacity="100%" style:font-name="Cambria" fo:font-size="11pt" fo:font-weight="normal" style:font-name-asian="Cambria" style:font-size-asian="11pt" style:font-weight-asian="normal" style:font-name-complex="Cambria" style:font-size-complex="11pt" style:font-weight-complex="normal"/>
    </style:style>
    <style:style style:name="T4" style:family="text">
      <style:text-properties fo:color="#000000" loext:opacity="100%" style:font-name="Symbol" fo:font-size="11pt" fo:font-weight="normal" style:font-name-asian="Symbol" style:font-size-asian="11pt" style:font-weight-asian="normal" style:font-name-complex="Symbol" style:font-size-complex="11pt" style:font-weight-complex="normal"/>
    </style:style>
    <style:style style:name="T5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position="super 58%" fo:font-size="16pt" style:font-size-asian="16pt" style:font-size-complex="16pt"/>
    </style:style>
    <style:style style:name="T9" style:family="text">
      <style:text-properties fo:color="#3465a4" loext:opacity="100%" style:font-name="Cambria" fo:font-size="11pt" fo:font-weight="normal" style:font-name-asian="Cambria" style:font-size-asian="11pt" style:font-weight-asian="normal" style:font-name-complex="Cambria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216cm" svg:height="0.92cm" svg:x="9.266cm" svg:y="2.728cm">
          <draw:text-box>
            <text:p text:style-name="P1"><text:span text:style-name="T1">CSC 281 </text:span></text:p>
          </draw:text-box>
        </draw:frame>
        <draw:polygon draw:style-name="gr2" draw:text-style-name="P3" draw:layer="layout" svg:width="15.344cm" svg:height="0.035cm" svg:x="3.126cm" svg:y="4.918cm" svg:viewBox="0 0 15345 36" draw:points="0,0 15345,0 15345,36 0,36">
          <text:p/>
        </draw:polygon>
        <draw:frame draw:style-name="gr1" draw:text-style-name="P2" draw:layer="layout" svg:width="12.599cm" svg:height="0.92cm" svg:x="3.296cm" svg:y="3.85cm">
          <draw:text-box>
            <text:p text:style-name="P1"><text:span text:style-name="T1">Collins, Trevon Submission At End</text:span></text:p>
          </draw:text-box>
        </draw:frame>
        <draw:frame draw:style-name="gr3" draw:text-style-name="P4" draw:layer="layout" svg:width="2.071cm" svg:height="0.497cm" svg:x="3.176cm" svg:y="5.904cm">
          <draw:text-box>
            <text:p text:style-name="P1"><text:span text:style-name="T2">Objective </text:span></text:p>
          </draw:text-box>
        </draw:frame>
        <draw:frame draw:style-name="gr4" draw:text-style-name="P5" draw:layer="layout" svg:width="14.177cm" svg:height="0.454cm" svg:x="3.176cm" svg:y="6.498cm">
          <draw:text-box>
            <text:p text:style-name="P1"><text:span text:style-name="T3">In this assignment, you will implement the Fibonacci sequence in two different ways: </text:span></text:p>
          </draw:text-box>
        </draw:frame>
        <draw:frame draw:style-name="gr4" draw:text-style-name="P5" draw:layer="layout" svg:width="4.858cm" svg:height="0.454cm" svg:x="3.176cm" svg:y="7.02cm">
          <draw:text-box>
            <text:p text:style-name="P1"><text:span text:style-name="T3">1. Recursive implementation </text:span></text:p>
          </draw:text-box>
        </draw:frame>
        <draw:frame draw:style-name="gr4" draw:text-style-name="P5" draw:layer="layout" svg:width="6.726cm" svg:height="0.454cm" svg:x="3.176cm" svg:y="7.542cm">
          <draw:text-box>
            <text:p text:style-name="P1"><text:span text:style-name="T3">2. Iterative implementation using a loop </text:span></text:p>
          </draw:text-box>
        </draw:frame>
        <draw:frame draw:style-name="gr4" draw:text-style-name="P5" draw:layer="layout" svg:width="0.387cm" svg:height="0.454cm" svg:x="3.176cm" svg:y="8.0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004cm" svg:height="0.454cm" svg:x="3.176cm" svg:y="8.587cm">
          <draw:text-box>
            <text:p text:style-name="P1"><text:span text:style-name="T3">The goal is to compare performance and understand when to use each approach. All </text:span></text:p>
          </draw:text-box>
        </draw:frame>
        <draw:frame draw:style-name="gr4" draw:text-style-name="P5" draw:layer="layout" svg:width="6.931cm" svg:height="0.454cm" svg:x="3.176cm" svg:y="9.109cm">
          <draw:text-box>
            <text:p text:style-name="P1"><text:span text:style-name="T3">implementations must be written in Java. </text:span></text:p>
          </draw:text-box>
        </draw:frame>
        <draw:frame draw:style-name="gr3" draw:text-style-name="P4" draw:layer="layout" svg:width="6.457cm" svg:height="0.497cm" svg:x="3.176cm" svg:y="10.589cm">
          <draw:text-box>
            <text:p text:style-name="P1"><text:span text:style-name="T2">Reminder: Fibonacci Definition </text:span></text:p>
          </draw:text-box>
        </draw:frame>
        <draw:frame draw:style-name="gr4" draw:text-style-name="P5" draw:layer="layout" svg:width="4.414cm" svg:height="0.454cm" svg:x="3.176cm" svg:y="11.177cm">
          <draw:text-box>
            <text:p text:style-name="P1"><text:span text:style-name="T3">fib(n) = fib(n-1) + fib(n-2) </text:span></text:p>
          </draw:text-box>
        </draw:frame>
        <draw:frame draw:style-name="gr4" draw:text-style-name="P5" draw:layer="layout" svg:width="4.967cm" svg:height="0.454cm" svg:x="3.176cm" svg:y="11.699cm">
          <draw:text-box>
            <text:p text:style-name="P1"><text:span text:style-name="T3">Base cases: fib(0)=0, fib(1)=1 </text:span></text:p>
          </draw:text-box>
        </draw:frame>
        <draw:frame draw:style-name="gr3" draw:text-style-name="P4" draw:layer="layout" svg:width="8.612cm" svg:height="0.497cm" svg:x="3.176cm" svg:y="13.173cm">
          <draw:text-box>
            <text:p text:style-name="P1"><text:span text:style-name="T2">Part 1: Implement Fibonacci in Two Ways </text:span></text:p>
          </draw:text-box>
        </draw:frame>
        <draw:frame draw:style-name="gr4" draw:text-style-name="P5" draw:layer="layout" svg:width="3.47cm" svg:height="0.454cm" svg:x="3.176cm" svg:y="13.76cm">
          <draw:text-box>
            <text:p text:style-name="P1"><text:span text:style-name="T3">A. Recursive version </text:span></text:p>
          </draw:text-box>
        </draw:frame>
        <draw:frame draw:style-name="gr4" draw:text-style-name="P5" draw:layer="layout" svg:width="3.25cm" svg:height="0.454cm" svg:x="3.176cm" svg:y="14.289cm">
          <draw:text-box>
            <text:p text:style-name="P1"><text:span text:style-name="T3">B. Iterative version </text:span></text:p>
          </draw:text-box>
        </draw:frame>
        <draw:frame draw:style-name="gr4" draw:text-style-name="P5" draw:layer="layout" svg:width="1.07cm" svg:height="0.454cm" svg:x="3.176cm" svg:y="15.164cm">
          <draw:text-box>
            <text:p text:style-name="P1"><text:span text:style-name="T3">Note: <text:s/></text:span></text:p>
          </draw:text-box>
        </draw:frame>
        <draw:frame draw:style-name="gr4" draw:text-style-name="P5" draw:layer="layout" svg:width="0.387cm" svg:height="0.475cm" svg:x="3.811cm" svg:y="16.039cm">
          <draw:text-box>
            <text:p text:style-name="P1"><text:span text:style-name="T4">•</text:span></text:p>
          </draw:text-box>
        </draw:frame>
        <draw:frame draw:style-name="gr4" draw:text-style-name="P5" draw:layer="layout" svg:width="0.387cm" svg:height="0.433cm" svg:x="3.987cm" svg:y="16.07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0.731cm" svg:height="0.454cm" svg:x="4.447cm" svg:y="16.06cm">
          <draw:text-box>
            <text:p text:style-name="P1"><text:span text:style-name="T3">You must write both the recursive and iterative versions in Java. </text:span></text:p>
          </draw:text-box>
        </draw:frame>
        <draw:frame draw:style-name="gr4" draw:text-style-name="P5" draw:layer="layout" svg:width="0.387cm" svg:height="0.475cm" svg:x="3.811cm" svg:y="16.583cm">
          <draw:text-box>
            <text:p text:style-name="P1"><text:span text:style-name="T4">•</text:span></text:p>
          </draw:text-box>
        </draw:frame>
        <draw:frame draw:style-name="gr4" draw:text-style-name="P5" draw:layer="layout" svg:width="0.387cm" svg:height="0.433cm" svg:x="3.987cm" svg:y="16.62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437cm" svg:height="0.454cm" svg:x="4.447cm" svg:y="16.604cm">
          <draw:text-box>
            <text:p text:style-name="P1"><text:span text:style-name="T3">Use standard Java libraries only. </text:span></text:p>
          </draw:text-box>
        </draw:frame>
        <draw:frame draw:style-name="gr4" draw:text-style-name="P5" draw:layer="layout" svg:width="0.387cm" svg:height="0.475cm" svg:x="3.811cm" svg:y="17.126cm">
          <draw:text-box>
            <text:p text:style-name="P1"><text:span text:style-name="T4">•</text:span></text:p>
          </draw:text-box>
        </draw:frame>
        <draw:frame draw:style-name="gr4" draw:text-style-name="P5" draw:layer="layout" svg:width="0.387cm" svg:height="0.433cm" svg:x="3.987cm" svg:y="17.16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544cm" svg:height="0.454cm" svg:x="4.447cm" svg:y="17.147cm">
          <draw:text-box>
            <text:p text:style-name="P1"><text:span text:style-name="T3">Do not use built-in functions or external libraries that compute Fibonacci for you. </text:span></text:p>
          </draw:text-box>
        </draw:frame>
        <draw:frame draw:style-name="gr3" draw:text-style-name="P4" draw:layer="layout" svg:width="6.989cm" svg:height="0.497cm" svg:x="3.176cm" svg:y="18.621cm">
          <draw:text-box>
            <text:p text:style-name="P1"><text:span text:style-name="T2">Part 2: Compute Fibonacci Values </text:span></text:p>
          </draw:text-box>
        </draw:frame>
        <draw:frame draw:style-name="gr4" draw:text-style-name="P5" draw:layer="layout" svg:width="7.274cm" svg:height="0.454cm" svg:x="3.176cm" svg:y="19.215cm">
          <draw:text-box>
            <text:p text:style-name="P1"><text:span text:style-name="T3">Test at least: n = 5, 10, 15, 20, 25, 30, 35, 40 </text:span></text:p>
          </draw:text-box>
        </draw:frame>
        <draw:frame draw:style-name="gr4" draw:text-style-name="P5" draw:layer="layout" svg:width="7.137cm" svg:height="0.454cm" svg:x="3.176cm" svg:y="19.737cm">
          <draw:text-box>
            <text:p text:style-name="P1"><text:span text:style-name="T3">Also attempt fib(100) using both methods. </text:span></text:p>
          </draw:text-box>
        </draw:frame>
        <draw:frame draw:style-name="gr3" draw:text-style-name="P4" draw:layer="layout" svg:width="6.339cm" svg:height="0.497cm" svg:x="3.176cm" svg:y="21.211cm">
          <draw:text-box>
            <text:p text:style-name="P1"><text:span text:style-name="T2">Part 3: Measure Running Time </text:span></text:p>
          </draw:text-box>
        </draw:frame>
        <draw:frame draw:style-name="gr4" draw:text-style-name="P5" draw:layer="layout" svg:width="8.809cm" svg:height="0.454cm" svg:x="3.176cm" svg:y="21.798cm">
          <draw:text-box>
            <text:p text:style-name="P1"><text:span text:style-name="T3">Record running time for each method and value of n. </text:span></text:p>
          </draw:text-box>
        </draw:frame>
        <draw:frame draw:style-name="gr4" draw:text-style-name="P5" draw:layer="layout" svg:width="3.467cm" svg:height="0.454cm" svg:x="3.176cm" svg:y="22.32cm">
          <draw:text-box>
            <text:p text:style-name="P1"><text:span text:style-name="T3">Include a table with: </text:span></text:p>
          </draw:text-box>
        </draw:frame>
        <draw:frame draw:style-name="gr4" draw:text-style-name="P5" draw:layer="layout" svg:width="0.52cm" svg:height="0.454cm" svg:x="3.176cm" svg:y="22.849cm">
          <draw:text-box>
            <text:p text:style-name="P1"><text:span text:style-name="T3">- n </text:span></text:p>
          </draw:text-box>
        </draw:frame>
        <draw:frame draw:style-name="gr4" draw:text-style-name="P5" draw:layer="layout" svg:width="3.001cm" svg:height="0.454cm" svg:x="3.176cm" svg:y="23.372cm">
          <draw:text-box>
            <text:p text:style-name="P1"><text:span text:style-name="T3">- Recursive result </text:span></text:p>
          </draw:text-box>
        </draw:frame>
        <draw:frame draw:style-name="gr4" draw:text-style-name="P5" draw:layer="layout" svg:width="2.784cm" svg:height="0.454cm" svg:x="3.176cm" svg:y="23.894cm">
          <draw:text-box>
            <text:p text:style-name="P1"><text:span text:style-name="T3">- Recursive time </text:span></text:p>
          </draw:text-box>
        </draw:frame>
        <draw:frame draw:style-name="gr4" draw:text-style-name="P5" draw:layer="layout" svg:width="2.785cm" svg:height="0.454cm" svg:x="3.176cm" svg:y="24.417cm">
          <draw:text-box>
            <text:p text:style-name="P1"><text:span text:style-name="T3">- Iterative result </text:span></text:p>
          </draw:text-box>
        </draw:frame>
        <draw:frame draw:style-name="gr4" draw:text-style-name="P5" draw:layer="layout" svg:width="2.568cm" svg:height="0.454cm" svg:x="3.176cm" svg:y="24.939cm">
          <draw:text-box>
            <text:p text:style-name="P1"><text:span text:style-name="T3">- Iterative time </text:span></text:p>
          </draw:text-box>
        </draw:frame>
      </draw:page>
      <draw:page draw:name="page2" draw:style-name="dp1" draw:master-page-name="master-page30">
        <draw:frame draw:style-name="gr3" draw:text-style-name="P4" draw:layer="layout" svg:width="5.481cm" svg:height="0.497cm" svg:x="3.176cm" svg:y="2.643cm">
          <draw:text-box>
            <text:p text:style-name="P1"><text:span text:style-name="T2">Part 4: Create a Line Chart </text:span></text:p>
          </draw:text-box>
        </draw:frame>
        <draw:frame draw:style-name="gr4" draw:text-style-name="P5" draw:layer="layout" svg:width="3.346cm" svg:height="0.454cm" svg:x="3.176cm" svg:y="3.231cm">
          <draw:text-box>
            <text:p text:style-name="P1"><text:span text:style-name="T3">Create a chart with: </text:span></text:p>
          </draw:text-box>
        </draw:frame>
        <draw:frame draw:style-name="gr4" draw:text-style-name="P5" draw:layer="layout" svg:width="1.68cm" svg:height="0.454cm" svg:x="3.176cm" svg:y="3.753cm">
          <draw:text-box>
            <text:p text:style-name="P1"><text:span text:style-name="T3">- x-axis: n </text:span></text:p>
          </draw:text-box>
        </draw:frame>
        <draw:frame draw:style-name="gr4" draw:text-style-name="P5" draw:layer="layout" svg:width="3.64cm" svg:height="0.454cm" svg:x="3.176cm" svg:y="4.282cm">
          <draw:text-box>
            <text:p text:style-name="P1"><text:span text:style-name="T3">- y-axis: running time </text:span></text:p>
          </draw:text-box>
        </draw:frame>
        <draw:frame draw:style-name="gr4" draw:text-style-name="P5" draw:layer="layout" svg:width="3.88cm" svg:height="0.454cm" svg:x="3.176cm" svg:y="4.804cm">
          <draw:text-box>
            <text:p text:style-name="P1"><text:span text:style-name="T3">- one line for recursion </text:span></text:p>
          </draw:text-box>
        </draw:frame>
        <draw:frame draw:style-name="gr4" draw:text-style-name="P5" draw:layer="layout" svg:width="3.726cm" svg:height="0.454cm" svg:x="3.176cm" svg:y="5.327cm">
          <draw:text-box>
            <text:p text:style-name="P1"><text:span text:style-name="T3">- one line for iteration </text:span></text:p>
          </draw:text-box>
        </draw:frame>
        <draw:frame draw:style-name="gr3" draw:text-style-name="P4" draw:layer="layout" svg:width="5.324cm" svg:height="0.497cm" svg:x="3.176cm" svg:y="6.8cm">
          <draw:text-box>
            <text:p text:style-name="P1"><text:span text:style-name="T2">Part 5: Answer Questions </text:span></text:p>
          </draw:text-box>
        </draw:frame>
        <draw:frame draw:style-name="gr4" draw:text-style-name="P5" draw:layer="layout" svg:width="9.084cm" svg:height="0.454cm" svg:x="3.176cm" svg:y="7.387cm">
          <draw:text-box>
            <text:p text:style-name="P1"><text:span text:style-name="T3">- Did both implementations produce the same results? </text:span></text:p>
          </draw:text-box>
        </draw:frame>
        <draw:frame draw:style-name="gr4" draw:text-style-name="P5" draw:layer="layout" svg:width="7.093cm" svg:height="0.454cm" svg:x="3.176cm" svg:y="8.262cm">
          <draw:text-box>
            <text:p text:style-name="P1"><text:span text:style-name="T3">- Which implementation was faster? Why? </text:span></text:p>
          </draw:text-box>
        </draw:frame>
        <draw:frame draw:style-name="gr4" draw:text-style-name="P5" draw:layer="layout" svg:width="8.062cm" svg:height="0.454cm" svg:x="3.176cm" svg:y="9.145cm">
          <draw:text-box>
            <text:p text:style-name="P1"><text:span text:style-name="T3">- How did recursive time change as n increased? </text:span></text:p>
          </draw:text-box>
        </draw:frame>
        <draw:frame draw:style-name="gr4" draw:text-style-name="P5" draw:layer="layout" svg:width="7.908cm" svg:height="0.454cm" svg:x="3.176cm" svg:y="10.02cm">
          <draw:text-box>
            <text:p text:style-name="P1"><text:span text:style-name="T3">- How did iterative time change as n increased? </text:span></text:p>
          </draw:text-box>
        </draw:frame>
        <draw:frame draw:style-name="gr4" draw:text-style-name="P5" draw:layer="layout" svg:width="7.093cm" svg:height="0.454cm" svg:x="3.176cm" svg:y="10.894cm">
          <draw:text-box>
            <text:p text:style-name="P1"><text:span text:style-name="T3">- Could you compute fib(100) recursively? </text:span></text:p>
          </draw:text-box>
        </draw:frame>
        <draw:frame draw:style-name="gr4" draw:text-style-name="P5" draw:layer="layout" svg:width="9.056cm" svg:height="0.454cm" svg:x="3.176cm" svg:y="11.77cm">
          <draw:text-box>
            <text:p text:style-name="P1"><text:span text:style-name="T3">- Which implementation is better for large n and why? </text:span></text:p>
          </draw:text-box>
        </draw:frame>
        <draw:frame draw:style-name="gr4" draw:text-style-name="P5" draw:layer="layout" svg:width="5.073cm" svg:height="0.454cm" svg:x="3.176cm" svg:y="12.645cm">
          <draw:text-box>
            <text:p text:style-name="P1"><text:span text:style-name="T3">- What repeated work occurs? </text:span></text:p>
          </draw:text-box>
        </draw:frame>
        <draw:frame draw:style-name="gr3" draw:text-style-name="P4" draw:layer="layout" svg:width="5.459cm" svg:height="0.497cm" svg:x="3.176cm" svg:y="14.118cm">
          <draw:text-box>
            <text:p text:style-name="P1"><text:span text:style-name="T2">Submission Requirements </text:span></text:p>
          </draw:text-box>
        </draw:frame>
        <draw:frame draw:style-name="gr4" draw:text-style-name="P5" draw:layer="layout" svg:width="0.387cm" svg:height="0.454cm" svg:x="3.176cm" svg:y="14.71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477cm" svg:height="0.454cm" svg:x="3.176cm" svg:y="15.235cm">
          <draw:text-box>
            <text:p text:style-name="P1"><text:span text:style-name="T3">1. Source code </text:span></text:p>
          </draw:text-box>
        </draw:frame>
        <draw:frame draw:style-name="gr4" draw:text-style-name="P5" draw:layer="layout" svg:width="6.269cm" svg:height="0.454cm" svg:x="3.176cm" svg:y="15.757cm">
          <draw:text-box>
            <text:p text:style-name="P1"><text:span text:style-name="T3">2. Report (with table, chart, answers) </text:span></text:p>
          </draw:text-box>
        </draw:frame>
        <draw:frame draw:style-name="gr4" draw:text-style-name="P5" draw:layer="layout" svg:width="5.464cm" svg:height="0.454cm" svg:x="3.176cm" svg:y="16.28cm">
          <draw:text-box>
            <text:p text:style-name="P1"><text:span text:style-name="T3">3. Screenshot of program output </text:span></text:p>
          </draw:text-box>
        </draw:frame>
        <draw:frame draw:style-name="gr4" draw:text-style-name="P5" draw:layer="layout" svg:width="0.387cm" svg:height="0.454cm" svg:x="3.176cm" svg:y="17.155cm">
          <draw:text-box>
            <text:p text:style-name="P1"><text:span text:style-name="T3"><text:s/></text:span></text:p>
          </draw:text-box>
        </draw:frame>
      </draw:page>
      <draw:page draw:name="page3" draw:style-name="dp1" draw:master-page-name="master-page30">
        <draw:frame draw:style-name="gr5" draw:text-style-name="P6" draw:layer="layout" svg:width="6.35cm" svg:height="0.937cm" svg:x="7.545cm" svg:y="2.917cm">
          <draw:text-box>
            <text:p>Java Source Code</text:p>
          </draw:text-box>
        </draw:frame>
        <draw:frame draw:style-name="gr6" draw:text-style-name="P8" draw:layer="layout" svg:width="13.653cm" svg:height="21.59cm" svg:x="4.052cm" svg:y="4.505cm">
          <draw:text-box>
            <text:p text:style-name="P7"><text:span text:style-name="T6">public class Homework02 </text:span></text:p>
            <text:p text:style-name="P7"><text:span text:style-name="T6">{</text:span></text:p>
            <text:p text:style-name="P7"><text:span text:style-name="T6"><text:s text:c="4"/>static long start, end;</text:span></text:p>
            <text:p text:style-name="P7"><text:span text:style-name="T6"><text:s text:c="4"/>static double fibElapsed, iterElapsed;</text:span></text:p>
            <text:p text:style-name="P7"><text:span text:style-name="T6"><text:s text:c="4"/>public static void main(String[] args) {</text:span></text:p>
            <text:p text:style-name="P7"><text:span text:style-name="T6"><text:s text:c="8"/>int[] fibArray = {5, 10, 15, 20, 25, 30, 35, 40, 100};</text:span></text:p>
            <text:p text:style-name="P7"><text:span text:style-name="T6"><text:s text:c="8"/>printTable(fibArray);</text:span></text:p>
            <text:p text:style-name="P7"><text:span text:style-name="T6"><text:s text:c="4"/>}</text:span></text:p>
            <text:p text:style-name="P7"><text:span text:style-name="T6"/></text:p>
            <text:p text:style-name="P7"><text:span text:style-name="T6"><text:s text:c="4"/>public static void printTable(int[] _fibArray) {</text:span></text:p>
            <text:p text:style-name="P7"><text:span text:style-name="T6"><text:s text:c="8"/>System.out.println("|Fibonacci Number (n)|");</text:span></text:p>
            <text:p text:style-name="P7"><text:span text:style-name="T6"><text:s text:c="8"/>for (int i : _fibArray) {</text:span></text:p>
            <text:p text:style-name="P7"><text:span text:style-name="T6"><text:s text:c="12"/>System.out.printf("%d|%d|%.1f|%d|%.1f|%n", i,fibRecursiveTrack(i), fibElapsed, fibIterative(i), iterElapsed);</text:span></text:p>
            <text:p text:style-name="P7"><text:span text:style-name="T6"><text:s text:c="12"/>System.out.println("----------------");</text:span></text:p>
            <text:p text:style-name="P7"><text:span text:style-name="T6"><text:s text:c="8"/>}</text:span></text:p>
            <text:p text:style-name="P7"><text:span text:style-name="T6"><text:s text:c="8"/>System.out.println("===========");</text:span></text:p>
            <text:p text:style-name="P7"><text:span text:style-name="T6"><text:s text:c="4"/>}</text:span></text:p>
            <text:p text:style-name="P7"><text:span text:style-name="T6"/></text:p>
            <text:p text:style-name="P7"><text:span text:style-name="T6"><text:s text:c="4"/>public static int fibRecursiveTrack(int n){</text:span></text:p>
            <text:p text:style-name="P7"><text:span text:style-name="T6"><text:s text:c="8"/>start = System.nanoTime();</text:span></text:p>
            <text:p text:style-name="P7"><text:span text:style-name="T6"><text:s text:c="8"/>int fibResult = fibRecursive(n);</text:span></text:p>
            <text:p text:style-name="P7"><text:span text:style-name="T6"><text:s text:c="8"/>end = System.nanoTime() - start;</text:span></text:p>
            <text:p text:style-name="P7"><text:span text:style-name="T6"><text:s text:c="8"/>fibElapsed = end / 1_000_000.0;</text:span></text:p>
            <text:p text:style-name="P7"><text:span text:style-name="T6"><text:s text:c="8"/>return fibResult;</text:span></text:p>
            <text:p text:style-name="P7"><text:span text:style-name="T6"><text:s text:c="4"/>}</text:span></text:p>
            <text:p text:style-name="P7"><text:span text:style-name="T6"><text:s text:c="4"/></text:span></text:p>
            <text:p text:style-name="P7"><text:span text:style-name="T6"/></text:p>
            <text:p text:style-name="P7"><text:span text:style-name="T6"/></text:p>
          </draw:text-box>
        </draw:frame>
      </draw:page>
      <draw:page draw:name="page4" draw:style-name="dp1" draw:master-page-name="master-page30">
        <draw:frame draw:style-name="gr7" draw:text-style-name="P6" draw:layer="layout" svg:width="12.331cm" svg:height="16.931cm" svg:x="4.104cm" svg:y="3.87cm">
          <draw:text-box>
            <text:p><text:span text:style-name="T6"><text:s text:c="4"/>public static int fibRecursive(int n) {</text:span></text:p>
            <text:p><text:span text:style-name="T6"><text:s text:c="8"/>if (n == 0){</text:span></text:p>
            <text:p><text:span text:style-name="T6"><text:s text:c="12"/>return 0;</text:span></text:p>
            <text:p><text:span text:style-name="T6"><text:s text:c="8"/>}</text:span></text:p>
            <text:p><text:span text:style-name="T6"><text:s text:c="8"/>if (n == 1){</text:span></text:p>
            <text:p><text:span text:style-name="T6"><text:s text:c="12"/>return 1;</text:span></text:p>
            <text:p><text:span text:style-name="T6"><text:s text:c="8"/>}</text:span></text:p>
            <text:p><text:span text:style-name="T6"><text:s text:c="8"/>return fibRecursive(n-1) + fibRecursive(n-2);</text:span></text:p>
            <text:p><text:span text:style-name="T6"><text:s text:c="4"/>}</text:span></text:p>
            <text:p><text:span text:style-name="T6"/></text:p>
            <text:p><text:span text:style-name="T6"><text:s text:c="4"/>public static int fibIterative(int n){</text:span></text:p>
            <text:p><text:span text:style-name="T6"><text:s text:c="8"/>start = System.nanoTime();</text:span></text:p>
            <text:p><text:span text:style-name="T6"><text:s text:c="8"/>int[] iterArray = new int[n+1];</text:span></text:p>
            <text:p><text:span text:style-name="T6"><text:s text:c="8"/>for (int i = 0; i &lt;= n; i++){</text:span></text:p>
            <text:p><text:span text:style-name="T6"><text:s text:c="12"/>if (i == 0){</text:span></text:p>
            <text:p><text:span text:style-name="T6"><text:s text:c="16"/>iterArray[i] = 0;</text:span></text:p>
            <text:p><text:span text:style-name="T6"><text:s text:c="12"/>} else if (i == 1){</text:span></text:p>
            <text:p><text:span text:style-name="T6"><text:s text:c="16"/>iterArray[i] = 1;</text:span></text:p>
            <text:p><text:span text:style-name="T6"><text:s text:c="12"/>} else {</text:span></text:p>
            <text:p><text:span text:style-name="T6"><text:s text:c="16"/>iterArray[i] = iterArray[i-1] + iterArray[i-2];</text:span></text:p>
            <text:p><text:span text:style-name="T6"><text:s text:c="12"/>}</text:span></text:p>
            <text:p><text:span text:style-name="T6"><text:s text:c="8"/>}</text:span></text:p>
            <text:p><text:span text:style-name="T6"><text:s text:c="8"/>end = System.nanoTime() - start;</text:span></text:p>
            <text:p><text:span text:style-name="T6"><text:s text:c="8"/>iterElapsed = end / 1_000_000;</text:span></text:p>
            <text:p><text:span text:style-name="T6"><text:s text:c="8"/>return iterArray[n];</text:span></text:p>
            <text:p><text:span text:style-name="T6"><text:s text:c="4"/>}</text:span></text:p>
            <text:p><text:span text:style-name="T6">}</text:span></text:p>
          </draw:text-box>
        </draw:frame>
      </draw:page>
      <draw:page draw:name="page5" draw:style-name="dp1" draw:master-page-name="master-page30">
        <draw:frame draw:style-name="gr8" draw:text-style-name="P6" draw:layer="layout" svg:width="2.223cm" svg:height="0.953cm" svg:x="9.649cm" svg:y="3.552cm">
          <draw:text-box>
            <text:p>Graph</text:p>
          </draw:text-box>
        </draw:frame>
        <draw:frame draw:style-name="gr9" draw:layer="layout" svg:width="13.712cm" svg:height="11.129cm" svg:x="3.951cm" svg:y="5.2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Recursive Result</text:p>
              </table:table-cell>
              <table:table-cell>
                <text:p text:style-name="P7">Recursive Time Elapsed</text:p>
              </table:table-cell>
              <table:table-cell>
                <text:p text:style-name="P7">Iterative Result</text:p>
              </table:table-cell>
              <table:table-cell>
                <text:p text:style-name="P7">Iterative Time Elapsed</text:p>
              </table:table-cell>
            </table:table-row>
            <table:table-row table:style-name="ro1" table:default-cell-style-name="ce2">
              <table:table-cell>
                <text:p text:style-name="P9">5</text:p>
              </table:table-cell>
              <table:table-cell>
                <text:p text:style-name="P9">5</text:p>
              </table:table-cell>
              <table:table-cell>
                <text:p text:style-name="P9">0ms</text:p>
              </table:table-cell>
              <table:table-cell>
                <text:p text:style-name="P9">5</text:p>
              </table:table-cell>
              <table:table-cell>
                <text:p text:style-name="P9">0ms</text:p>
              </table:table-cell>
            </table:table-row>
            <table:table-row table:style-name="ro2" table:default-cell-style-name="ce2">
              <table:table-cell>
                <text:p text:style-name="P9">10</text:p>
              </table:table-cell>
              <table:table-cell>
                <text:p text:style-name="P9">55</text:p>
              </table:table-cell>
              <table:table-cell>
                <text:p text:style-name="P9">0ms</text:p>
              </table:table-cell>
              <table:table-cell>
                <text:p text:style-name="P9">55</text:p>
              </table:table-cell>
              <table:table-cell>
                <text:p text:style-name="P9">0ms</text:p>
              </table:table-cell>
            </table:table-row>
            <table:table-row table:style-name="ro2" table:default-cell-style-name="ce2">
              <table:table-cell>
                <text:p text:style-name="P9">15</text:p>
              </table:table-cell>
              <table:table-cell>
                <text:p text:style-name="P9">610</text:p>
              </table:table-cell>
              <table:table-cell>
                <text:p text:style-name="P9">0.1ms</text:p>
              </table:table-cell>
              <table:table-cell>
                <text:p text:style-name="P9">610</text:p>
              </table:table-cell>
              <table:table-cell>
                <text:p text:style-name="P9">0ms</text:p>
              </table:table-cell>
            </table:table-row>
            <table:table-row table:style-name="ro2" table:default-cell-style-name="ce2">
              <table:table-cell>
                <text:p text:style-name="P9">20</text:p>
              </table:table-cell>
              <table:table-cell>
                <text:p text:style-name="P9">6765</text:p>
              </table:table-cell>
              <table:table-cell>
                <text:p text:style-name="P9">0.2ms</text:p>
              </table:table-cell>
              <table:table-cell>
                <text:p text:style-name="P9">6765</text:p>
              </table:table-cell>
              <table:table-cell>
                <text:p text:style-name="P9">0ms</text:p>
              </table:table-cell>
            </table:table-row>
            <table:table-row table:style-name="ro2" table:default-cell-style-name="ce2">
              <table:table-cell>
                <text:p text:style-name="P9">25</text:p>
              </table:table-cell>
              <table:table-cell>
                <text:p text:style-name="P9"><text:span text:style-name="T6">75025</text:span></text:p>
              </table:table-cell>
              <table:table-cell>
                <text:p text:style-name="P9">1.0ms</text:p>
              </table:table-cell>
              <table:table-cell>
                <text:p text:style-name="P9"><text:span text:style-name="T6">75025</text:span></text:p>
              </table:table-cell>
              <table:table-cell>
                <text:p text:style-name="P9">0ms</text:p>
              </table:table-cell>
            </table:table-row>
            <table:table-row table:style-name="ro2" table:default-cell-style-name="ce2">
              <table:table-cell>
                <text:p text:style-name="P9">30</text:p>
              </table:table-cell>
              <table:table-cell>
                <text:p text:style-name="P9"><text:span text:style-name="T6">832040</text:span></text:p>
              </table:table-cell>
              <table:table-cell>
                <text:p text:style-name="P9">3.7ms</text:p>
              </table:table-cell>
              <table:table-cell>
                <text:p text:style-name="P9"><text:span text:style-name="T6">832040</text:span></text:p>
              </table:table-cell>
              <table:table-cell>
                <text:p text:style-name="P9">0ms</text:p>
              </table:table-cell>
            </table:table-row>
            <table:table-row table:style-name="ro2" table:default-cell-style-name="ce2">
              <table:table-cell>
                <text:p text:style-name="P9">35</text:p>
              </table:table-cell>
              <table:table-cell>
                <text:p text:style-name="P9"><text:span text:style-name="T6">9227465</text:span></text:p>
              </table:table-cell>
              <table:table-cell>
                <text:p text:style-name="P9">43.6ms</text:p>
              </table:table-cell>
              <table:table-cell>
                <text:p text:style-name="P9"><text:span text:style-name="T6">9227465</text:span></text:p>
              </table:table-cell>
              <table:table-cell>
                <text:p text:style-name="P9">0ms</text:p>
              </table:table-cell>
            </table:table-row>
            <table:table-row table:style-name="ro2" table:default-cell-style-name="ce2">
              <table:table-cell>
                <text:p text:style-name="P9">40</text:p>
              </table:table-cell>
              <table:table-cell>
                <text:p text:style-name="P9"><text:span text:style-name="T6">102334155</text:span></text:p>
              </table:table-cell>
              <table:table-cell>
                <text:p text:style-name="P9">442.0ms</text:p>
              </table:table-cell>
              <table:table-cell>
                <text:p text:style-name="P9"><text:span text:style-name="T6">102334155</text:span></text:p>
              </table:table-cell>
              <table:table-cell>
                <text:p text:style-name="P9">0ms</text:p>
              </table:table-cell>
            </table:table-row>
            <table:table-row table:style-name="ro3" table:default-cell-style-name="ce2">
              <table:table-cell>
                <text:p text:style-name="P9">100</text:p>
              </table:table-cell>
              <table:table-cell table:style-name="ce3">
                <text:p text:style-name="P10"><text:span text:style-name="T7">Undetermined</text:span></text:p>
              </table:table-cell>
              <table:table-cell>
                <text:p text:style-name="P9"><text:span text:style-name="T6">~10 yrs</text:span><text:span text:style-name="T8">*</text:span></text:p>
              </table:table-cell>
              <table:table-cell>
                <text:p text:style-name="P9">Too large</text:p>
              </table:table-cell>
              <table:table-cell>
                <text:p text:style-name="P9">0m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1" draw:layer="layout" svg:width="13.866cm" svg:height="7.774cm" svg:x="4.035cm" svg:y="18.8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6" draw:style-name="dp1" draw:master-page-name="master-page30">
        <draw:frame draw:style-name="gr11" draw:text-style-name="P12" draw:layer="layout" svg:width="13.092cm" svg:height="0.907cm" svg:x="4.37cm" svg:y="3.87cm">
          <draw:text-box>
            <text:p text:style-name="P1"><text:span text:style-name="T3">- Did both implementations produce the same results? </text:span><text:span text:style-name="T9">They both use the same </text:span></text:p>
            <text:p text:style-name="P1"><text:span text:style-name="T9">values that would depend on the results of previous entries.</text:span></text:p>
          </draw:text-box>
        </draw:frame>
        <draw:frame draw:style-name="gr4" draw:text-style-name="P5" draw:layer="layout" svg:width="13.845cm" svg:height="1.36cm" svg:x="4.37cm" svg:y="5.383cm">
          <draw:text-box>
            <text:p text:style-name="P1"><text:span text:style-name="T3">- Which implementation was faster? Why? <text:s/></text:span><text:span text:style-name="T9">The iterative implementation was faster</text:span></text:p>
            <text:p text:style-name="P1"><text:span text:style-name="T9">because the for loop can use stored information unlike the recursive that always </text:span></text:p>
            <text:p text:style-name="P1"><text:span text:style-name="T9">calculates in run time.</text:span></text:p>
          </draw:text-box>
        </draw:frame>
        <draw:frame draw:style-name="gr4" draw:text-style-name="P5" draw:layer="layout" svg:width="13.665cm" svg:height="0.907cm" svg:x="4.37cm" svg:y="7.045cm">
          <draw:text-box>
            <text:p text:style-name="P1"><text:span text:style-name="T3">- How did recursive time change as n increased? </text:span><text:span text:style-name="T9">It began to increase exponentially</text:span></text:p>
            <text:p text:style-name="P1"><text:span text:style-name="T9">with every </text:span><text:span text:style-name="T3"><text:s/></text:span></text:p>
          </draw:text-box>
        </draw:frame>
        <draw:frame draw:style-name="gr4" draw:text-style-name="P5" draw:layer="layout" svg:width="11.369cm" svg:height="0.454cm" svg:x="4.37cm" svg:y="7.92cm">
          <draw:text-box>
            <text:p text:style-name="P1"><text:span text:style-name="T3">- How did iterative time change as n increased? </text:span><text:span text:style-name="T9">It remained constant</text:span></text:p>
          </draw:text-box>
        </draw:frame>
        <draw:frame draw:style-name="gr4" draw:text-style-name="P5" draw:layer="layout" svg:width="7.816cm" svg:height="0.454cm" svg:x="4.37cm" svg:y="8.794cm">
          <draw:text-box>
            <text:p text:style-name="P1"><text:span text:style-name="T3">- Could you compute fib(100) recursively? </text:span><text:span text:style-name="T9">No. </text:span><text:span text:style-name="T3"><text:s/></text:span></text:p>
          </draw:text-box>
        </draw:frame>
        <draw:frame draw:style-name="gr4" draw:text-style-name="P5" draw:layer="layout" svg:width="13.529cm" svg:height="0.907cm" svg:x="4.37cm" svg:y="9.67cm">
          <draw:text-box>
            <text:p text:style-name="P1"><text:span text:style-name="T3">- Which implementation is better for large n and why? <text:s/></text:span><text:span text:style-name="T9">Iterative is better for large</text:span></text:p>
            <text:p text:style-name="P1"><text:span text:style-name="T9">n because it can utilize stored memory a</text:span><text:span text:style-name="T3"> from the device.</text:span></text:p>
          </draw:text-box>
        </draw:frame>
        <draw:frame draw:style-name="gr4" draw:text-style-name="P5" draw:layer="layout" svg:width="11.936cm" svg:height="0.454cm" svg:x="4.37cm" svg:y="10.545cm">
          <draw:text-box>
            <text:p text:style-name="P1"><text:span text:style-name="T3">- What repeated work occurs? <text:s/></text:span><text:span text:style-name="T9">The mathematics of the previous entri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2.6cm" fo:margin-bottom="1cm" fo:margin-left="3.1cm" fo:margin-right="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27T23:41:21.879746000</dc:date>
    <meta:editing-duration>PT7M35S</meta:editing-duration>
    <meta:editing-cycles>1</meta:editing-cycles>
    <meta:document-statistic meta:object-count="70"/>
    <meta:generator>LibreOffice/26.2.1.2$Windows_X86_64 LibreOffice_project/620$Build-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67cm" svg:height="7.775cm" xlink:href="." xlink:type="simple" chart:class="chart:line" chart:style-name="ch1">
        <chart:legend chart:legend-position="end" svg:x="10.935cm" svg:y="3.339cm" style:legend-expansion="high" chart:style-name="ch2"/>
        <chart:plot-area chart:style-name="ch3" svg:x="0.277cm" svg:y="0.155cm" svg:width="10.381cm" svg:height="7.465cm">
          <chart:coordinate-region svg:x="1.124cm" svg:y="0.355cm" svg:width="9.334cm" svg:height="6.61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ursive</text:p>
              </table:table-cell>
              <table:table-cell office:value-type="string">
                <text:p>Iterative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6">
                <text:p>4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