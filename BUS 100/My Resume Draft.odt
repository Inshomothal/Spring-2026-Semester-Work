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243in" table:align="margins"/>
    </style:style>
    <style:style style:name="Table1.A" style:family="table-column">
      <style:table-column-properties style:column-width="3.0396in" style:rel-column-width="44033*"/>
    </style:style>
    <style:style style:name="Table1.B" style:family="table-column">
      <style:table-column-properties style:column-width="1.4847in" style:rel-column-width="21502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4.5243in" table:align="margins"/>
    </style:style>
    <style:style style:name="Table2.A" style:family="table-column">
      <style:table-column-properties style:column-width="3.0396in" style:rel-column-width="4377*"/>
    </style:style>
    <style:style style:name="Table2.B" style:family="table-column">
      <style:table-column-properties style:column-width="1.4847in" style:rel-column-width="2138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4.5243in" table:align="margins"/>
    </style:style>
    <style:style style:name="Table3.A" style:family="table-column">
      <style:table-column-properties style:column-width="2.2618in" style:rel-column-width="32767*"/>
    </style:style>
    <style:style style:name="Table3.B" style:family="table-column">
      <style:table-column-properties style:column-width="2.2625in" style:rel-column-width="32768*"/>
    </style:style>
    <style:style style:name="Table3.A1" style:family="table-cell">
      <style:table-cell-properties fo:padding="0in" fo:border="none"/>
    </style:style>
    <style:style style:name="P1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style:shadow="none" fo:keep-with-next="always"/>
      <style:text-properties officeooo:rsid="000c0808" officeooo:paragraph-rsid="000c0808"/>
    </style:style>
    <style:style style:name="P2" style:family="paragraph" style:parent-style-name="Text_20_body">
      <style:paragraph-properties style:shadow="none"/>
      <style:text-properties fo:color="#666666" loext:opacity="100%" fo:font-weight="bold" officeooo:rsid="0013023f" officeooo:paragraph-rsid="00047a24"/>
    </style:style>
    <style:style style:name="P3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  <style:text-properties officeooo:paragraph-rsid="00047a24"/>
    </style:style>
    <style:style style:name="P4" style:family="paragraph" style:parent-style-name="Text_20_body">
      <style:paragraph-properties style:shadow="none"/>
      <style:text-properties fo:font-weight="bold" officeooo:rsid="0013f2a7" officeooo:paragraph-rsid="00047a24"/>
    </style:style>
    <style:style style:name="P5" style:family="paragraph" style:parent-style-name="Text_20_body">
      <style:paragraph-properties style:shadow="none"/>
      <style:text-properties fo:font-weight="bold" officeooo:rsid="000d0eab" officeooo:paragraph-rsid="000d0eab" style:font-weight-asian="bold" style:font-weight-complex="bold"/>
    </style:style>
    <style:style style:name="P6" style:family="paragraph" style:parent-style-name="Heading_20_3">
      <style:text-properties officeooo:rsid="0020bee8" officeooo:paragraph-rsid="00047a24"/>
    </style:style>
    <style:style style:name="P7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fo:font-weight="bold" officeooo:rsid="0013f2a7" officeooo:paragraph-rsid="00062e06"/>
    </style:style>
    <style:style style:name="P8" style:family="paragraph" style:parent-style-name="Text_20_body">
      <style:paragraph-properties fo:text-align="right" style:justify-single-word="false" style:shadow="none"/>
      <style:text-properties fo:font-weight="normal" officeooo:rsid="0013f2a7" officeooo:paragraph-rsid="00062e06"/>
    </style:style>
    <style:style style:name="P9" style:family="paragraph" style:parent-style-name="Text_20_body" style:list-style-name="L1">
      <style:text-properties officeooo:rsid="000c0808" officeooo:paragraph-rsid="000c0808"/>
    </style:style>
    <style:style style:name="P10" style:family="paragraph" style:parent-style-name="Text_20_body" style:list-style-name="L1">
      <style:paragraph-properties style:writing-mode="lr-tb" style:writing-mode-automatic="false"/>
      <style:text-properties officeooo:rsid="000c0808" officeooo:paragraph-rsid="000c0808"/>
    </style:style>
    <style:style style:name="P11" style:family="paragraph" style:parent-style-name="Text_20_body" style:list-style-name="L1">
      <style:text-properties officeooo:rsid="000d0eab" officeooo:paragraph-rsid="000d0eab"/>
    </style:style>
    <style:style style:name="P12" style:family="paragraph" style:parent-style-name="Heading_20_3">
      <style:text-properties officeooo:paragraph-rsid="00062e06"/>
    </style:style>
    <style:style style:name="P13" style:family="paragraph" style:parent-style-name="Text_20_body" style:list-style-name="L1">
      <style:paragraph-properties style:shadow="none"/>
      <style:text-properties officeooo:rsid="000d0eab" officeooo:paragraph-rsid="000d0eab"/>
    </style:style>
    <style:style style:name="T1" style:family="text">
      <style:text-properties officeooo:rsid="000c0808"/>
    </style:style>
    <style:style style:name="T2" style:family="text">
      <style:text-properties officeooo:rsid="000c0808" style:font-weight-asian="bold" style:font-weight-complex="bold"/>
    </style:style>
    <style:style style:name="T3" style:family="text">
      <style:text-properties fo:font-weight="normal" officeooo:rsid="0017273a"/>
    </style:style>
    <style:style style:name="T4" style:family="text">
      <style:text-properties fo:font-weight="normal" officeooo:rsid="000c080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0eab"/>
    </style:style>
    <style:style style:name="T7" style:family="text">
      <style:text-properties fo:font-weight="normal" officeooo:rsid="000c0808" style:font-weight-asian="bold" style:font-weight-complex="bold"/>
    </style:style>
    <style:style style:name="T8" style:family="text">
      <style:text-properties fo:font-weight="normal" officeooo:rsid="00157aba"/>
    </style:style>
    <style:style style:name="T9" style:family="text">
      <style:text-properties officeooo:rsid="000d0ea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revon Collins</text:h>
      <text:p text:style-name="P2"><text:span text:style-name="T1">10736 Barlow Ave, Lynwood, CA 90262</text:span><text:line-break/><text:span text:style-name="T1">Apt C.</text:span></text:p>
      <text:p text:style-name="P2">(<text:span text:style-name="T1">323</text:span>) <text:span text:style-name="T1">346 8934</text:span></text:p>
      <text:p text:style-name="P2"><text:span text:style-name="T1">trevonecollins</text:span>@<text:span text:style-name="T1">gmail</text:span>.com</text:p>
      <text:h text:style-name="P3" text:outline-level="3">Education</text:h>
      <text:p text:style-name="P4"><text:span text:style-name="T2">AA in Computer Science</text:span><text:span text:style-name="T3"><text:line-break/></text:span><text:span text:style-name="T4">Los Angeles Southwest College</text:span><text:span text:style-name="T3">, May </text:span><text:span text:style-name="T4">2025</text:span><text:span text:style-name="T3"><text:line-break/>Cumulative GPA: 2.</text:span><text:span text:style-name="T4">78</text:span></text:p>
      <text:p text:style-name="P5">BA in Computer Science (Projected)<text:line-break/><text:span text:style-name="T5">CSUDH, May 2027 (Projected)<text:line-break/>Cumulative GPA: 3.01 (Projected)</text:span></text:p>
      <text:h text:style-name="P6" text:outline-level="3">Experienc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span text:style-name="T1">Aircraft Structural Repairman</text:span><text:line-break/><text:span text:style-name="T4">Mili</text:span><text:span text:style-name="T6">t</text:span><text:span text:style-name="T4">ary</text:span></text:p>
          </table:table-cell>
          <table:table-cell table:style-name="Table1.A1" office:value-type="string">
            <text:p text:style-name="P8">J<text:span text:style-name="T1">ul</text:span> 201<text:span text:style-name="T1">4</text:span> – <text:span text:style-name="T1">Jul </text:span>20<text:span text:style-name="T1">22</text:span></text:p>
          </table:table-cell>
        </table:table-row>
      </table:table>
      <text:list text:style-name="L1">
        <text:list-item>
          <text:p text:style-name="P9">Read schematics and blueprints accurately</text:p>
        </text:list-item>
        <text:list-item>
          <text:p text:style-name="P9">Fabricate repair patches and airworthy structures</text:p>
        </text:list-item>
        <text:list-item>
          <text:p text:style-name="P10">Maintain required inspections in accordance with S.O.P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7">Sheet Metal Worker</text:span><text:span text:style-name="T8"><text:line-break/></text:span><text:span text:style-name="T4">S</text:span><text:span text:style-name="T6">MART</text:span></text:p>
          </table:table-cell>
          <table:table-cell table:style-name="Table2.A1" office:value-type="string">
            <text:p text:style-name="P8">Jun 20<text:span text:style-name="T9">21</text:span> – Nov 20<text:span text:style-name="T9">23</text:span></text:p>
          </table:table-cell>
        </table:table-row>
      </table:table>
      <text:list text:continue-numbering="true" text:style-name="L1">
        <text:list-item>
          <text:p text:style-name="P11">Install HVAC equipment and machinery</text:p>
        </text:list-item>
        <text:list-item>
          <text:p text:style-name="P11">Maintain tools and equipment purchased and/or given</text:p>
        </text:list-item>
        <text:list-item>
          <text:p text:style-name="P11">Maintain safety regulations through proper etiquette and reports of violations</text:p>
        </text:list-item>
      </text:list>
      <text:h text:style-name="P12" text:outline-level="3">Skill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text:style-name="L1">
              <text:list-item>
                <text:p text:style-name="P13">IT</text:p>
              </text:list-item>
              <text:list-item>
                <text:p text:style-name="P13">Web Development</text:p>
              </text:list-item>
              <text:list-item>
                <text:p text:style-name="P13">Window &amp; Mac</text:p>
              </text:list-item>
            </text:list>
          </table:table-cell>
          <table:table-cell table:style-name="Table3.A1" office:value-type="string">
            <text:list text:continue-numbering="true" text:style-name="L1">
              <text:list-item>
                <text:p text:style-name="P13">Sheet Metal Fabrication</text:p>
              </text:list-item>
              <text:list-item>
                <text:p text:style-name="P13">Safety Handling</text:p>
              </text:list-item>
              <text:list-item>
                <text:p text:style-name="P13">Machine Maintenanc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 fo:padding="0.0201in" fo:border-left="none" fo:border-right="none" fo:border-top="0.06pt solid #000000" fo:border-bottom="0.06pt solid #000000" style:shadow="non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236*" fo:start-indent="0in" fo:end-indent="0.0756in"/>
          <style:column style:rel-width="6402*" fo:start-indent="0.0756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5:14:57.996415200</meta:creation-date>
    <meta:editing-duration>PT7M15S</meta:editing-duration>
    <meta:editing-cycles>2</meta:editing-cycles>
    <meta:generator>LibreOffice/26.2.0.3$Windows_X86_64 LibreOffice_project/620$Build-3</meta:generator>
    <dc:title>Resume</dc:title>
    <dc:date>2026-03-05T15:32:33.348461000</dc:date>
    <meta:document-statistic meta:table-count="3" meta:image-count="0" meta:object-count="0" meta:page-count="1" meta:paragraph-count="25" meta:word-count="124" meta:character-count="805" meta:non-whitespace-character-count="716"/>
    <meta:template xlink:type="simple" xlink:actuate="onRequest" xlink:title="Resume" xlink:href="../../../../../../../../Program%20Files/LibreOffice/share/template/common/personal/Resume1page.ott" meta:date="2026-03-05T15:14:57.511457100"/>
  </office:meta>
</office:document-meta>
</file>