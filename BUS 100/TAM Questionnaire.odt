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itle">
      <style:text-properties officeooo:rsid="00119da1" officeooo:paragraph-rsid="00119da1"/>
    </style:style>
    <style:style style:name="P2" style:family="paragraph" style:parent-style-name="Heading_20_1">
      <style:text-properties officeooo:rsid="00119da1" officeooo:paragraph-rsid="00119da1"/>
    </style:style>
    <style:style style:name="P3" style:family="paragraph" style:parent-style-name="Table_20_Contents" style:list-style-name="L1">
      <style:text-properties officeooo:rsid="00119da1" officeooo:paragraph-rsid="00119da1"/>
    </style:style>
    <style:style style:name="P4" style:family="paragraph" style:parent-style-name="Table_20_Contents" style:list-style-name="L1">
      <style:text-properties officeooo:rsid="001408ed" officeooo:paragraph-rsid="001408ed"/>
    </style:style>
    <style:style style:name="P5" style:family="paragraph" style:parent-style-name="Table_20_Contents" style:list-style-name="L2">
      <style:text-properties officeooo:rsid="00119da1" officeooo:paragraph-rsid="00119da1"/>
    </style:style>
    <style:style style:name="P6" style:family="paragraph" style:parent-style-name="Standard" style:list-style-name="L3">
      <style:text-properties officeooo:rsid="00119da1" officeooo:paragraph-rsid="00119da1"/>
    </style:style>
    <style:style style:name="P7" style:family="paragraph" style:parent-style-name="Standard" style:list-style-name="L3">
      <style:text-properties officeooo:rsid="001408ed" officeooo:paragraph-rsid="001408ed"/>
    </style:style>
    <style:style style:name="T1" style:family="text">
      <style:text-properties officeooo:rsid="001408ed"/>
    </style:style>
    <style:style style:name="T2" style:family="text">
      <style:text-properties officeooo:rsid="00158b3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M Questionnaire</text:p>
      <text:h text:style-name="P2" text:outline-level="1">These Criteria are important firs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text:style-name="L1">
              <text:list-item>
                <text:p text:style-name="P3">Female</text:p>
              </text:list-item>
              <text:list-item>
                <text:p text:style-name="P4">Single</text:p>
              </text:list-item>
              <text:list-item>
                <text:p text:style-name="P3">Mother</text:p>
              </text:list-item>
              <text:list-item>
                <text:p text:style-name="P3">28 – 58 yrs old</text:p>
              </text:list-item>
              <text:list-item>
                <text:p text:style-name="P3">Low – Income</text:p>
              </text:list-item>
            </text:list>
          </table:table-cell>
          <table:table-cell table:style-name="Table1.A1" office:value-type="string">
            <text:list text:style-name="L2">
              <text:list-item>
                <text:p text:style-name="P5">Travel or Shops</text:p>
              </text:list-item>
              <text:list-item>
                <text:p text:style-name="P5">Frequently outside</text:p>
              </text:list-item>
              <text:list-item>
                <text:p text:style-name="P5">Apartments or congested parking</text:p>
              </text:list-item>
            </text:list>
          </table:table-cell>
        </table:table-row>
      </table:table>
      <text:p text:style-name="Standard"/>
      <text:list text:style-name="L3">
        <text:list-item>
          <text:p text:style-name="P6">Do you have a car? <text:span text:style-name="T1">What do you use it for?</text:span> <text:span text:style-name="T1">If not, how often do you use public transportation?</text:span></text:p>
        </text:list-item>
        <text:list-item>
          <text:p text:style-name="P7">What difficulties have you had with your car or public transportation? (Parking, maintenance, etc.)</text:p>
        </text:list-item>
        <text:list-item>
          <text:p text:style-name="P7">What do you consider to be good quality service for a car share company?</text:p>
        </text:list-item>
        <text:list-item>
          <text:p text:style-name="P6">What would you pay to get a car <text:span text:style-name="T2">that you rented </text:span>delivered to you?</text:p>
        </text:list-item>
        <text:list-item>
          <text:p text:style-name="P7">If you’ve used a car share service, how has your experience been with them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22:56:58.773666000</meta:creation-date>
    <dc:date>2026-03-17T11:51:59.514353300</dc:date>
    <meta:editing-duration>PT1H41M17S</meta:editing-duration>
    <meta:editing-cycles>3</meta:editing-cycles>
    <meta:generator>LibreOffice/26.2.0.3$Windows_X86_64 LibreOffice_project/620$Build-3</meta:generator>
    <meta:document-statistic meta:table-count="1" meta:image-count="0" meta:object-count="0" meta:page-count="1" meta:paragraph-count="15" meta:word-count="114" meta:character-count="583" meta:non-whitespace-character-count="495"/>
  </office:meta>
</office:document-meta>
</file>