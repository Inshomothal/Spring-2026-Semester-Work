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MIKC I+ Bembo" svg:font-family="'OMIKC I+ Bembo'" style:font-family-generic="roman" style:font-pitch="variable"/>
    <style:font-face style:name="OMIKC I+ Bembo1" svg:font-family="'OMIKC I+ Bembo'" style:font-family-generic="system" style:font-pitch="variable"/>
    <style:font-face style:name="OMIKG I+ Bembo" svg:font-family="'OMIKG I+ Bembo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9.625in" fo:margin-left="-0.375in" fo:margin-top="0in" fo:margin-bottom="0in" table:align="left" style:writing-mode="lr-tb"/>
    </style:style>
    <style:style style:name="Table1.A" style:family="table-column">
      <style:table-column-properties style:column-width="1.9833in"/>
    </style:style>
    <style:style style:name="Table1.B" style:family="table-column">
      <style:table-column-properties style:column-width="1.7007in"/>
    </style:style>
    <style:style style:name="Table1.C" style:family="table-column">
      <style:table-column-properties style:column-width="0.1868in"/>
    </style:style>
    <style:style style:name="Table1.D" style:family="table-column">
      <style:table-column-properties style:column-width="1.8306in"/>
    </style:style>
    <style:style style:name="Table1.E" style:family="table-column">
      <style:table-column-properties style:column-width="2.0486in"/>
    </style:style>
    <style:style style:name="Table1.F" style:family="table-column">
      <style:table-column-properties style:column-width="1.875in"/>
    </style:style>
    <style:style style:name="Table1.1" style:family="table-row">
      <style:table-row-properties style:min-row-height="0.1813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2.3326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3.4556in" fo:keep-together="auto"/>
    </style:style>
    <style:style style:name="Table1.4" style:family="table-row">
      <style:table-row-properties style:min-row-height="0.7604in" fo:keep-together="auto"/>
    </style:style>
    <style:style style:name="P1" style:family="paragraph" style:parent-style-name="Standard">
      <style:paragraph-properties fo:margin-top="0in" fo:margin-bottom="0in" style:contextual-spacing="false" fo:text-align="left" style:justify-single-word="false" fo:orphans="2" fo:widows="2">
        <style:tab-stops>
          <style:tab-stop style:position="1.2339in"/>
        </style:tab-stops>
      </style:paragraph-properties>
      <style:text-properties style:font-name="Calibri" fo:font-size="10pt" fo:language="en" fo:country="US" officeooo:paragraph-rsid="00168a9a" style:letter-kerning="false" style:font-size-asian="10pt" style:language-asian="en" style:country-asian="US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P3" style:family="paragraph" style:parent-style-name="List_20_Paragraph" style:list-style-name="WWNum14">
      <style:paragraph-properties fo:margin-top="0in" fo:margin-bottom="0in" style:contextual-spacing="true" fo:text-align="left" style:justify-single-word="false" fo:orphans="2" fo:widows="2"/>
      <style:text-properties officeooo:paragraph-rsid="001badff"/>
    </style:style>
    <style:style style:name="P4" style:family="paragraph" style:parent-style-name="List_20_Paragraph" style:list-style-name="WWNum14">
      <style:paragraph-properties fo:margin-top="0in" fo:margin-bottom="0in" style:contextual-spacing="true" fo:text-align="left" style:justify-single-word="false" fo:orphans="2" fo:widows="2"/>
    </style:style>
    <style:style style:name="P5" style:family="paragraph" style:parent-style-name="List_20_Paragraph" style:list-style-name="WWNum14">
      <style:paragraph-properties fo:margin-top="0in" fo:margin-bottom="0in" style:contextual-spacing="true" fo:text-align="left" style:justify-single-word="false" fo:orphans="2" fo:widows="2"/>
      <style:text-properties officeooo:paragraph-rsid="001d8c41"/>
    </style:style>
    <style:style style:name="P6" style:family="paragraph" style:parent-style-name="List_20_Paragraph" style:list-style-name="WWNum14">
      <style:paragraph-properties fo:margin-top="0in" fo:margin-bottom="0in" style:contextual-spacing="true" fo:text-align="left" style:justify-single-word="false" fo:orphans="2" fo:widows="2"/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P7" style:family="paragraph" style:parent-style-name="Standard">
      <style:paragraph-properties fo:margin-left="0.1736in" fo:margin-top="0in" fo:margin-bottom="0in" style:contextual-spacing="false" fo:text-align="left" style:justify-single-word="false" fo:orphans="2" fo:widows="2"/>
    </style:style>
    <style:style style:name="P8" style:family="paragraph" style:parent-style-name="Standard">
      <style:paragraph-properties fo:margin-left="0.1736in" fo:margin-top="0in" fo:margin-bottom="0in" style:contextual-spacing="false" fo:text-align="left" style:justify-single-word="false" fo:orphans="2" fo:widows="2"/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P9" style:family="paragraph" style:parent-style-name="List_20_Paragraph" style:list-style-name="WWNum8">
      <style:paragraph-properties fo:margin-top="0in" fo:margin-bottom="0in" style:contextual-spacing="true" fo:text-align="left" style:justify-single-word="false" fo:orphans="2" fo:widows="2"/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000000" loext:opacity="100%" style:font-name="Calibri" fo:font-size="12pt" fo:language="en" fo:country="US" officeooo:paragraph-rsid="00168a9a" style:letter-kerning="false" style:font-size-asian="12pt" style:language-asian="en" style:country-asian="US" style:language-complex="ar" style:country-complex="SA">
        <loext:char-complex-color loext:theme-type="dark1" loext:color-type="theme"/>
      </style:text-properties>
    </style:style>
    <style:style style:name="P11" style:family="paragraph" style:parent-style-name="Standard">
      <style:text-properties style:text-underline-style="solid" style:text-underline-width="auto" style:text-underline-color="font-color" officeooo:rsid="00168a9a" officeooo:paragraph-rsid="00168a9a" fo:background-color="#f6f9d4"/>
    </style:style>
    <style:style style:name="P12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000000" loext:opacity="100%" style:font-name="Calibri" fo:font-size="12pt" fo:language="en" fo:country="US" fo:font-weight="bold" officeooo:rsid="001887f2" officeooo:paragraph-rsid="001887f2" style:letter-kerning="false" style:font-size-asian="12pt" style:language-asian="en" style:country-asian="US" style:font-weight-asian="bold" style:language-complex="ar" style:country-complex="SA" style:font-weight-complex="bold">
        <loext:char-complex-color loext:theme-type="dark1" loext:color-type="theme"/>
      </style:text-properties>
    </style:style>
    <style:style style:name="P13" style:family="paragraph" style:parent-style-name="Standard">
      <style:text-properties officeooo:paragraph-rsid="00168a9a"/>
    </style:style>
    <style:style style:name="P14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officeooo:paragraph-rsid="001887f2" style:letter-kerning="false" style:font-size-asian="10pt" style:language-asian="en" style:country-asian="US" style:language-complex="ar" style:country-complex="SA"/>
    </style:style>
    <style:style style:name="P15" style:family="paragraph" style:parent-style-name="Standard">
      <style:text-properties style:text-underline-style="solid" style:text-underline-width="auto" style:text-underline-color="font-color" officeooo:rsid="001887f2" officeooo:paragraph-rsid="001887f2" fo:background-color="#f6f9d4"/>
    </style:style>
    <style:style style:name="P16" style:family="paragraph" style:parent-style-name="Standard">
      <style:paragraph-properties fo:margin-top="0in" fo:margin-bottom="0in" style:contextual-spacing="false" fo:text-align="left" style:justify-single-word="false" fo:orphans="2" fo:widows="2" fo:padding-left="0in" fo:padding-right="0in" fo:padding-top="0in" fo:padding-bottom="0.0138in" fo:border-left="none" fo:border-right="none" fo:border-top="none" fo:border-bottom="1.5pt solid #000000"/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P17" style:family="paragraph" style:parent-style-name="Standard" style:list-style-name="L1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officeooo:rsid="00255ce1" officeooo:paragraph-rsid="00255ce1" style:letter-kerning="false" fo:background-color="#f6f9d4" style:font-size-asian="10pt" style:language-asian="en" style:country-asian="US" style:language-complex="ar" style:country-complex="SA"/>
    </style:style>
    <style:style style:name="P18" style:family="paragraph" style:parent-style-name="Standard" style:list-style-name="L1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officeooo:rsid="00208140" officeooo:paragraph-rsid="00208140" style:letter-kerning="false" fo:background-color="#f6f9d4" style:font-size-asian="10pt" style:language-asian="en" style:country-asian="US" style:language-complex="ar" style:country-complex="SA"/>
    </style:style>
    <style:style style:name="P19" style:family="paragraph" style:parent-style-name="Standard" style:list-style-name="L2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officeooo:rsid="00208140" officeooo:paragraph-rsid="00208140" style:letter-kerning="false" fo:background-color="#f6f9d4" style:font-size-asian="10pt" style:language-asian="en" style:country-asian="US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ff0000" loext:opacity="100%" style:font-name="Calibri" fo:font-size="5pt" fo:language="en" fo:country="US" style:letter-kerning="false" style:font-size-asian="5pt" style:language-asian="en" style:country-asian="US" style:font-size-complex="5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000000" loext:opacity="100%" style:font-name="Calibri" fo:font-size="12pt" fo:language="en" fo:country="US" officeooo:paragraph-rsid="00208140" style:letter-kerning="false" style:font-size-asian="12pt" style:language-asian="en" style:country-asian="US" style:language-complex="ar" style:country-complex="SA">
        <loext:char-complex-color loext:theme-type="dark1" loext:color-type="theme"/>
      </style:text-properties>
    </style:style>
    <style:style style:name="P22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365f91" loext:opacity="100%" style:font-name="Calibri" fo:font-size="10pt" fo:language="en" fo:country="US" style:text-underline-style="solid" style:text-underline-width="auto" style:text-underline-color="font-color" officeooo:rsid="00208140" officeooo:paragraph-rsid="00208140" style:letter-kerning="false" fo:background-color="#f6f9d4" style:font-name-asian="ＭＳ 明朝" style:font-size-asian="10pt" style:language-asian="en" style:country-asian="US" style:font-name-complex="Times New Roman1" style:font-size-complex="12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P23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ff0000" loext:opacity="100%" style:font-name="Calibri" fo:font-size="12pt" fo:language="en" fo:country="US" style:letter-kerning="false" style:font-size-asian="12pt" style:language-asian="en" style:country-asian="US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left" style:justify-single-word="false" fo:orphans="2" fo:widows="2"/>
    </style:style>
    <style:style style:name="P25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officeooo:paragraph-rsid="001d8c41"/>
    </style:style>
    <style:style style:name="P26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ff0000" loext:opacity="100%" style:font-name="Calibri" fo:font-size="12pt" fo:language="en" fo:country="US" style:text-underline-style="solid" style:text-underline-width="auto" style:text-underline-color="font-color" fo:font-weight="bold" officeooo:rsid="001d8c41" officeooo:paragraph-rsid="001d8c41" style:letter-kerning="false" style:font-name-asian="ＭＳ 明朝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7" style:family="paragraph" style:parent-style-name="List_20_Paragraph" style:list-style-name="WWNum7">
      <style:paragraph-properties fo:margin-top="0in" fo:margin-bottom="0in" style:contextual-spacing="true" fo:text-align="left" style:justify-single-word="false" fo:orphans="2" fo:widows="2"/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fo:font-weight="bold" style:letter-kerning="false" style:font-size-asian="10pt" style:language-asian="en" style:country-asian="US" style:font-weight-asian="bold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officeooo:paragraph-rsid="00208140" style:letter-kerning="false" style:font-size-asian="10pt" style:language-asian="en" style:country-asian="US" style:language-complex="ar" style:country-complex="SA"/>
    </style:style>
    <style:style style:name="P30" style:family="paragraph" style:parent-style-name="Standard">
      <style:text-properties officeooo:paragraph-rsid="00208140"/>
    </style:style>
    <style:style style:name="P31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style:text-underline-style="solid" style:text-underline-width="auto" style:text-underline-color="font-color" fo:font-weight="bold" style:letter-kerning="false" style:font-size-asian="10pt" style:language-asian="en" style:country-asian="US" style:font-weight-asian="bold" style:language-complex="ar" style:country-complex="SA" style:font-weight-complex="bold"/>
    </style:style>
    <style:style style:name="P32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Calibri" fo:font-size="10pt" fo:language="en" fo:country="US" officeooo:rsid="00208140" officeooo:paragraph-rsid="00208140" style:letter-kerning="false" style:font-size-asian="10pt" style:language-asian="en" style:country-asian="US" style:language-complex="ar" style:country-complex="SA"/>
    </style:style>
    <style:style style:name="P33" style:family="paragraph" style:parent-style-name="Standard">
      <style:paragraph-properties fo:margin-left="-0.1874in"/>
    </style:style>
    <style:style style:name="P34" style:family="paragraph" style:parent-style-name="Standard">
      <style:paragraph-properties fo:margin-left="-0.5in"/>
    </style:style>
    <style:style style:name="T1" style:family="text">
      <style:text-properties style:text-underline-style="solid" style:text-underline-width="auto" style:text-underline-color="font-color" fo:background-color="#f6f9d4" loext:char-shading-value="0"/>
    </style:style>
    <style:style style:name="T2" style:family="text">
      <style:text-properties style:text-underline-style="solid" style:text-underline-width="auto" style:text-underline-color="font-color" officeooo:rsid="00168a9a" fo:background-color="#f6f9d4" loext:char-shading-value="0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0" loext:opacity="100%" style:font-name="Calibri" fo:font-size="12pt" fo:language="en" fo:country="US" style:text-underline-style="none" style:letter-kerning="false" style:font-size-asian="12pt" style:language-asian="en" style:country-asian="US" style:language-complex="ar" style:country-complex="SA">
        <loext:char-complex-color loext:theme-type="dark1" loext:color-type="theme"/>
      </style:text-properties>
    </style:style>
    <style:style style:name="T6" style:family="text">
      <style:text-properties fo:color="#365f91" loext:opacity="100%" style:font-name="Calibri" fo:font-size="10pt" fo:language="en" fo:country="US" style:text-underline-style="solid" style:text-underline-width="auto" style:text-underline-color="font-color" style:letter-kerning="false" fo:background-color="#f6f9d4" loext:char-shading-value="0" style:font-name-asian="ＭＳ 明朝" style:font-size-asian="10pt" style:language-asian="en" style:country-asian="US" style:font-name-complex="Times New Roman1" style:font-size-complex="12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T7" style:family="text">
      <style:text-properties fo:color="#365f91" loext:opacity="100%" style:font-name="Calibri" fo:font-size="10pt" fo:language="en" fo:country="US" style:text-underline-style="solid" style:text-underline-width="auto" style:text-underline-color="font-color" style:letter-kerning="false" style:font-name-asian="ＭＳ 明朝" style:font-size-asian="10pt" style:language-asian="en" style:country-asian="US" style:font-name-complex="Times New Roman1" style:font-size-complex="12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000000" loext:opacity="100%" fo:font-size="12pt" style:font-size-asian="12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Calibri" fo:font-size="12pt" fo:language="en" fo:country="US" style:letter-kerning="false" style:font-size-asian="12pt" style:language-asian="en" style:country-asian="US" style:language-complex="ar" style:country-complex="SA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Calibri" fo:font-size="12pt" fo:language="en" fo:country="US" officeooo:rsid="001d8c41" style:letter-kerning="false" style:font-size-asian="12pt" style:language-asian="en" style:country-asian="US" style:language-complex="ar" style:country-complex="SA">
        <loext:char-complex-color loext:theme-type="dark1" loext:color-type="theme"/>
      </style:text-properties>
    </style:style>
    <style:style style:name="T11" style:family="text">
      <style:text-properties fo:color="#365f91" loext:opacity="100%" style:text-underline-style="solid" style:text-underline-width="auto" style:text-underline-color="font-color" officeooo:rsid="00168a9a" fo:background-color="#f6f9d4" loext:char-shading-value="0" style:font-name-asian="ＭＳ 明朝" style:font-name-complex="Times New Roman1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color="#ff0000" loext:opacity="100%" fo:font-size="12pt" style:font-size-asian="1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68a9a"/>
    </style:style>
    <style:style style:name="T15" style:family="text">
      <style:text-properties fo:color="#ff0000" loext:opacity="100%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6" style:family="text">
      <style:text-properties fo:color="#000000" loext:opacity="100%" style:font-name="Calibri" fo:font-size="12pt" fo:language="en" fo:country="US" style:letter-kerning="false" style:font-name-asian="ＭＳ 明朝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/>
      </style:text-properties>
    </style:style>
    <style:style style:name="T17" style:family="text">
      <style:text-properties style:text-underline-style="solid" style:text-underline-width="auto" style:text-underline-color="font-color" officeooo:rsid="001887f2" fo:background-color="#f6f9d4" loext:char-shading-value="0"/>
    </style:style>
    <style:style style:name="T18" style:family="text">
      <style:text-properties fo:color="#000000" loext:opacity="100%" fo:font-size="12pt" fo:font-weight="bold" style:font-size-asian="12pt" style:font-weight-asian="bold" style:font-weight-complex="bold">
        <loext:char-complex-color loext:theme-type="dark1" loext:color-type="theme"/>
      </style:text-properties>
    </style:style>
    <style:style style:name="T19" style:family="text">
      <style:text-properties fo:color="#ff0000" loext:opacity="100%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0" style:family="text">
      <style:text-properties fo:color="#000000" loext:opacity="100%" fo:font-size="12pt" style:text-underline-style="solid" style:text-underline-width="auto" style:text-underline-color="font-color" fo:font-weight="bold" officeooo:rsid="001887f2" style:font-size-asian="12pt" style:font-weight-asian="bold" style:font-weight-complex="bold">
        <loext:char-complex-color loext:theme-type="dark1" loext:color-type="theme"/>
      </style:text-properties>
    </style:style>
    <style:style style:name="T21" style:family="text"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weight-complex="bold">
        <loext:char-complex-color loext:theme-type="dark1" loext:color-type="theme"/>
      </style:text-properties>
    </style:style>
    <style:style style:name="T22" style:family="text">
      <style:text-properties fo:color="#ff0000" loext:opacity="100%" fo:font-size="12pt" style:text-underline-style="solid" style:text-underline-width="auto" style:text-underline-color="font-color" style:font-size-asian="12pt"/>
    </style:style>
    <style:style style:name="T23" style:family="text">
      <style:text-properties fo:color="#ff0000" loext:opacity="100%" fo:font-size="12pt" officeooo:rsid="001e7d95" fo:background-color="#f6f9d4" loext:char-shading-value="0" style:font-size-asian="12pt"/>
    </style:style>
    <style:style style:name="T24" style:family="text">
      <style:text-properties fo:color="#ff0000" loext:opacity="100%" fo:font-size="12pt" fo:background-color="#f6f9d4" loext:char-shading-value="0" style:font-size-asian="12pt"/>
    </style:style>
    <style:style style:name="T25" style:family="text">
      <style:text-properties fo:color="#ff0000" loext:opacity="100%" fo:font-size="12pt" officeooo:rsid="001f6007" fo:background-color="#f6f9d4" loext:char-shading-value="0" style:font-size-asian="12pt"/>
    </style:style>
    <style:style style:name="T26" style:family="text">
      <style:text-properties fo:color="#ff0000" loext:opacity="100%" fo:font-size="12pt" style:text-underline-style="solid" style:text-underline-width="auto" style:text-underline-color="font-color" officeooo:rsid="001f6007" style:font-size-asian="12pt"/>
    </style:style>
    <style:style style:name="T27" style:family="text">
      <style:text-properties fo:color="#ff0000" loext:opacity="100%" fo:font-size="12pt" style:text-underline-style="solid" style:text-underline-width="auto" style:text-underline-color="font-color" fo:background-color="#f6f9d4" loext:char-shading-value="0" style:font-size-asian="12pt"/>
    </style:style>
    <style:style style:name="T28" style:family="text">
      <style:text-properties fo:color="#ff0000" loext:opacity="100%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fo:color="#ff0000" loext:opacity="100%" fo:font-size="11pt" fo:font-style="normal" style:text-underline-style="solid" style:text-underline-width="auto" style:text-underline-color="font-color" fo:background-color="#f6f9d4" loext:char-shading-value="0" style:font-size-asian="11pt" style:font-style-asian="normal" style:font-size-complex="11pt" style:font-style-complex="normal"/>
    </style:style>
    <style:style style:name="T30" style:family="text">
      <style:text-properties fo:color="#ff0000" loext:opacity="100%" fo:font-size="12pt" style:text-underline-style="solid" style:text-underline-width="auto" style:text-underline-color="font-color" officeooo:rsid="00226605" fo:background-color="transparent" loext:char-shading-value="0" style:font-size-asian="12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 officeooo:rsid="001f6007" fo:background-color="#f6f9d4" loext:char-shading-value="0"/>
    </style:style>
    <style:style style:name="T33" style:family="text">
      <style:text-properties style:text-underline-style="none"/>
    </style:style>
    <style:style style:name="T34" style:family="text">
      <style:text-properties fo:color="#000000" loext:opacity="100%" fo:font-weight="bold" style:font-weight-asian="bold" style:font-weight-complex="bold">
        <loext:char-complex-color loext:theme-type="dark1" loext:color-type="theme"/>
      </style:text-properties>
    </style:style>
    <style:style style:name="T35" style:family="text">
      <style:text-properties fo:color="#c00000" loext:opacity="100%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c00000" loext:opacity="100%" fo:font-weight="bold" style:font-weight-asian="bold" style:font-weight-complex="bold"/>
    </style:style>
    <style:style style:name="T37" style:family="text">
      <style:text-properties fo:color="#ff0000" loext:opacity="100%" fo:font-size="5pt" style:font-size-asian="5pt" style:font-size-complex="5pt"/>
    </style:style>
    <style:style style:name="T38" style:family="text">
      <style:text-properties fo:color="#ff0000" loext:opacity="100%" fo:font-size="12pt" fo:font-weight="bold" style:font-size-asian="12pt" style:font-weight-asian="bold" style:font-weight-complex="bold"/>
    </style:style>
    <style:style style:name="T39" style:family="text">
      <style:text-properties fo:color="#ee0000" loext:opacity="100%" fo:font-size="12pt" style:text-underline-style="solid" style:text-underline-width="auto" style:text-underline-color="font-color" style:font-size-asian="12pt"/>
    </style:style>
    <style:style style:name="T40" style:family="text">
      <style:text-properties style:use-window-font-color="true" loext:opacity="0%" fo:font-size="12pt" style:font-size-asian="12pt"/>
    </style:style>
    <style:style style:name="T41" style:family="text">
      <style:text-properties fo:font-weight="bold" style:font-weight-asian="bold"/>
    </style:style>
    <style:style style:name="T42" style:family="text">
      <style:text-properties fo:color="#000000" loext:opacity="100%" fo:font-size="12pt" style:text-underline-style="solid" style:text-underline-width="auto" style:text-underline-color="font-color" style:font-size-asian="12pt">
        <loext:char-complex-color loext:theme-type="dark1" loext:color-type="theme"/>
      </style:text-properties>
    </style:style>
    <style:style style:name="T43" style:family="text">
      <style:text-properties fo:font-size="12pt" style:font-size-asian="12pt"/>
    </style:style>
    <style:style style:name="T44" style:family="text">
      <style:text-properties style:font-name="Calibri" fo:font-size="12pt" fo:language="en" fo:country="US" style:letter-kerning="false" style:font-size-asian="12pt" style:language-asian="en" style:country-asian="US" style:language-complex="ar" style:country-complex="SA"/>
    </style:style>
    <style:style style:name="T45" style:family="text">
      <style:text-properties fo:color="#365f91" loext:opacity="100%" style:text-underline-style="solid" style:text-underline-width="auto" style:text-underline-color="font-color" officeooo:rsid="001887f2" fo:background-color="#f6f9d4" loext:char-shading-value="0" style:font-name-asian="ＭＳ 明朝" style:font-name-complex="Times New Roman1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6" style:family="text">
      <style:text-properties style:text-underline-style="solid" style:text-underline-width="auto" style:text-underline-color="font-color" fo:font-weight="bold" officeooo:rsid="00208140" fo:background-color="#f6f9d4" loext:char-shading-value="0" style:font-weight-asian="bold"/>
    </style:style>
    <style:style style:name="T47" style:family="text">
      <style:text-properties style:font-name="Calibri" fo:font-size="10pt" fo:language="en" fo:country="US" fo:font-weight="bold" style:letter-kerning="false" style:font-size-asian="10pt" style:language-asian="en" style:country-asian="US" style:font-weight-asian="bold" style:language-complex="ar" style:country-complex="SA"/>
    </style:style>
    <style:style style:name="T48" style:family="text">
      <style:text-properties style:font-name="Calibri" fo:font-size="10pt" fo:language="en" fo:country="US" style:text-underline-style="solid" style:text-underline-width="auto" style:text-underline-color="font-color" fo:font-weight="bold" officeooo:rsid="00208140" style:letter-kerning="false" fo:background-color="#f6f9d4" loext:char-shading-value="0" style:font-size-asian="10pt" style:language-asian="en" style:country-asian="US" style:font-weight-asian="bold" style:language-complex="ar" style:country-complex="SA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background-color="#f6f9d4" loext:char-shading-value="0"/>
    </style:style>
    <style:style style:name="T51" style:family="text">
      <style:text-properties officeooo:rsid="00208140"/>
    </style:style>
    <style:style style:name="T52" style:family="text">
      <style:text-properties officeooo:rsid="00208140" fo:background-color="#f6f9d4" loext:char-shading-value="0"/>
    </style:style>
    <style:style style:name="T53" style:family="text">
      <style:text-properties style:font-name="Calibri" fo:font-size="10pt" fo:language="en" fo:country="US" style:letter-kerning="false" style:font-size-asian="10pt" style:language-asian="en" style:country-asian="US" style:language-complex="ar" style:country-complex="SA"/>
    </style:style>
    <style:style style:name="T54" style:family="text">
      <style:text-properties fo:color="#365f91" loext:opacity="100%" style:font-name="Calibri" fo:font-size="10pt" fo:language="en" fo:country="US" style:text-underline-style="solid" style:text-underline-width="auto" style:text-underline-color="font-color" fo:font-weight="bold" officeooo:rsid="00208140" style:letter-kerning="false" fo:background-color="#f6f9d4" loext:char-shading-value="0" style:font-name-asian="ＭＳ 明朝" style:font-size-asian="10pt" style:language-asian="en" style:country-asian="US" style:font-weight-asian="bold" style:font-name-complex="Times New Roman1" style:font-size-complex="12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T55" style:family="text">
      <style:text-properties fo:color="#365f91" loext:opacity="100%" style:font-name="Calibri" fo:font-size="9pt" fo:language="en" fo:country="US" style:text-underline-style="solid" style:text-underline-width="auto" style:text-underline-color="font-color" fo:font-weight="bold" officeooo:rsid="00208140" style:letter-kerning="false" fo:background-color="#f6f9d4" loext:char-shading-value="0" style:font-name-asian="ＭＳ 明朝" style:font-size-asian="9pt" style:language-asian="en" style:country-asian="US" style:font-weight-asian="bold" style:font-name-complex="Times New Roman1" style:font-size-complex="9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T56" style:family="text">
      <style:text-properties fo:font-size="10pt" fo:font-weight="bold" fo:background-color="#ff0000" loext:char-shading-value="0" style:font-size-asian="10pt" style:font-weight-asian="bold" style:font-size-complex="10pt" style:font-weight-complex="bold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1">COMPANY NAME_<text:span text:style-name="T1">Wheel Quick</text:span>______ COMPANY TYPE__<text:span text:style-name="T1">Online - Service</text:span>____ SOFT LAUNCH DATE__<text:span text:style-name="T1">Jan 20</text:span><text:span text:style-name="T2">27</text:span>_HARD LAUNCH DATE__<text:span text:style-name="T1">Feb 2027</text:span>____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2" loext:marker-style-name="T3"><text:span text:style-name="T4">Key Partners:</text:span><text:span text:style-name="T3"> (External)(Box3b)</text:span></text:p>
            <text:list text:style-name="WWNum14">
              <text:list-item>
                <text:p text:style-name="P3"><text:span text:style-name="T5">Advisor: </text:span><text:span text:style-name="T6">Polk,G</text:span><text:span text:style-name="T7">.</text:span></text:p>
              </text:list-item>
              <text:list-item>
                <text:p text:style-name="P4" loext:marker-style-name="T8"><text:span text:style-name="T9">SBDC: <text:s/></text:span><text:span text:style-name="T6">PCR</text:span></text:p>
              </text:list-item>
              <text:list-item>
                <text:p text:style-name="P4" loext:marker-style-name="T8"><text:span text:style-name="T9">Mentor_</text:span><text:span text:style-name="T6">Polk, G.</text:span></text:p>
              </text:list-item>
              <text:list-item>
                <text:p text:style-name="P4" loext:marker-style-name="T8"><text:span text:style-name="T9">Legal: </text:span><text:span text:style-name="T6">LegalZoom</text:span></text:p>
              </text:list-item>
              <text:list-item>
                <text:p text:style-name="P4" loext:marker-style-name="T8"><text:span text:style-name="T9">CPA_</text:span><text:span text:style-name="T6">Quickbooks Live</text:span></text:p>
              </text:list-item>
              <text:list-item>
                <text:p text:style-name="P5" loext:marker-style-name="T8"><text:span text:style-name="T9">Insurance Broker/Agent </text:span><text:span text:style-name="T10">_</text:span><text:span text:style-name="T11">Next Insurance</text:span></text:p>
              </text:list-item>
              <text:list-item>
                <text:p text:style-name="P4" loext:marker-style-name="T8"><text:span text:style-name="T9">Bank/Banker _</text:span><text:span text:style-name="T6">Wells Fargo</text:span><text:span text:style-name="T9">/ __</text:span><text:span text:style-name="T6">Axial</text:span><text:span text:style-name="T9">______</text:span></text:p>
              </text:list-item>
              <text:list-item>
                <text:p text:style-name="P4" loext:marker-style-name="T8"><text:span text:style-name="T9">Key Vendor(s) ___</text:span><text:span text:style-name="T11">Ridecell</text:span></text:p>
              </text:list-item>
              <text:list-item>
                <text:p text:style-name="P4" loext:marker-style-name="T8"><text:span text:style-name="T9">Key Partner(s) __</text:span><text:span text:style-name="T11">Mobility Fund</text:span></text:p>
              </text:list-item>
              <text:list-item>
                <text:p text:style-name="P6" loext:marker-style-name="T8"><text:span text:style-name="T8">Advisory Board</text:span><text:span text:style-name="T8"/></text:p>
              </text:list-item>
            </text:list>
            <text:p text:style-name="P7" loext:marker-style-name="T8"><text:span text:style-name="T11">Polk, G.</text:span><text:span text:style-name="T9">__________</text:span><text:span text:style-name="T10">__</text:span></text:p>
            <text:p text:style-name="P7" loext:marker-style-name="T8"><text:span text:style-name="T11">Artiano, L.</text:span><text:span text:style-name="T9">_________</text:span></text:p>
            <text:p text:style-name="P8" loext:marker-style-name="T12"><text:span text:style-name="T8">__________________</text:span><text:span text:style-name="T12"/></text:p>
          </table:table-cell>
          <table:table-cell table:style-name="Table1.A2" table:number-columns-spanned="2" office:value-type="string">
            <text:p text:style-name="P2" loext:marker-style-name="T3"><text:span text:style-name="T4">Key Activities</text:span><text:span text:style-name="T3"> Operations:(B2)</text:span></text:p>
            <text:p text:style-name="P2">What’s your Core Business?</text:p>
            <text:p text:style-name="P2">At a minimum, what do you do best? <text:span text:style-name="T1">We offer vehicles </text:span></text:p>
            <text:p text:style-name="P2"><text:span text:style-name="T1">for customers to borrow for their personal use.</text:span><text:span text:style-name="T13">______</text:span><text:span text:style-name="T14">__</text:span></text:p>
            <text:p text:style-name="P2" loext:marker-style-name="T8"><text:span text:style-name="T8">Think Efficiency/Systems</text:span><text:span text:style-name="T8"/></text:p>
            <text:list text:style-name="WWNum8">
              <text:list-item>
                <text:p text:style-name="P9" loext:marker-style-name="T8"><text:span text:style-name="T8">Standard Ops.Pro</text:span><text:span text:style-name="T8"/></text:p>
              </text:list-item>
            </text:list>
            <text:p text:style-name="P2" loext:marker-style-name="T15"><text:span text:style-name="T15">DE Steps: 7, 10</text:span><text:span text:style-name="T15"/></text:p>
            <text:p text:style-name="P2" loext:marker-style-name="T8"><text:span text:style-name="T8">“E-Myth, Revisited”</text:span><text:span text:style-name="T8"/></text:p>
            <text:p text:style-name="P2" loext:marker-style-name="T12"><text:span text:style-name="T8"><text:s text:c="4"/>By Mike E. Gerber</text:span><text:span text:style-name="T12"/></text:p>
            <text:p text:style-name="P2">The System is the Solution</text:p>
          </table:table-cell>
          <table:covered-table-cell/>
          <table:table-cell table:style-name="Table1.A2" table:number-rows-spanned="2" office:value-type="string">
            <text:p text:style-name="P2" loext:marker-style-name="T4"><text:span text:style-name="T4">Unique Value Proposition</text:span><text:bookmark text:name="permission-for-group:1179715682:everyone"/><text:span text:style-name="T4"/></text:p>
            <text:p text:style-name="P10" loext:marker-style-name="T8">What VALUE are you offering your Clients?</text:p>
            <text:p text:style-name="P11">We offer our clients ease of access by handling the cost of maintenance a vehicles usually requires</text:p>
            <text:p text:style-name="P12">___________________</text:p>
            <text:p text:style-name="P13"><text:span text:style-name="T16">What’s Your Mission?</text:span><text:span text:style-name="T2">Make transportation better for famil</text:span><text:span text:style-name="T17">ies</text:span><text:span text:style-name="T2">.</text:span></text:p>
            <text:p text:style-name="P2" loext:marker-style-name="T8"><text:span text:style-name="T8">What’s Your Values?</text:span><text:span text:style-name="T8"/></text:p>
            <text:p text:style-name="P11">Support, Perseverance, Tenacity</text:p>
            <text:p text:style-name="P14" loext:marker-style-name="T18"><text:span text:style-name="T18">___________________</text:span></text:p>
            <text:p text:style-name="P2" loext:marker-style-name="T19"><text:span text:style-name="T19">Your Vision for Success</text:span><text:span text:style-name="T19"/></text:p>
            <text:p text:style-name="P2" loext:marker-style-name="T12"><text:span text:style-name="T20">I</text:span><text:span text:style-name="T21">n five years</text:span><text:span text:style-name="T22">?</text:span></text:p>
            <text:p text:style-name="P15">Multiple parking lots or structures with bike safety that have our cars parked there for access and are near apartment centers.</text:p>
            <text:p text:style-name="P2" loext:marker-style-name="T12"><text:span text:style-name="T8">What’s your long-term goals, provide 3 goals:<text:line-break/>(must be quantifiable)<text:line-break/> <text:s/></text:span><text:span text:style-name="T18">S.M.A.R.T. Goals?</text:span></text:p>
            <text:p text:style-name="P2" loext:marker-style-name="T12"><text:span text:style-name="T12">$Ave Sales Price: </text:span><text:span text:style-name="T23">$</text:span><text:span text:style-name="T24">1</text:span><text:span text:style-name="T25">1</text:span><text:span text:style-name="T24">/hr</text:span></text:p>
            <text:p text:style-name="P2" loext:marker-style-name="T12"><text:span text:style-name="T12">$Annual Sales:</text:span><text:span text:style-name="T24">$396,000</text:span></text:p>
            <text:p text:style-name="P2" loext:marker-style-name="T12"><text:span text:style-name="T12"># Ees: </text:span><text:span text:style-name="T26">_</text:span><text:span text:style-name="T22">___</text:span><text:span text:style-name="T27">16</text:span><text:span text:style-name="T22">_______</text:span></text:p>
            <text:p text:style-name="P2" loext:marker-style-name="T12"><text:span text:style-name="T12"># Locations: </text:span><text:span text:style-name="T28">___</text:span><text:span text:style-name="T29">6</text:span><text:span text:style-name="T28">_____</text:span></text:p>
            <text:p text:style-name="P2" loext:marker-style-name="T12"><text:span text:style-name="T12"># Clients: </text:span><text:span text:style-name="T22">___</text:span><text:span text:style-name="T27">300</text:span><text:span text:style-name="T30">____</text:span></text:p>
          </table:table-cell>
          <table:table-cell table:style-name="Table1.A2" office:value-type="string">
            <text:p text:style-name="P2" loext:marker-style-name="T4"><text:span text:style-name="T4"><text:s/>Competitive Advantage</text:span><text:span text:style-name="T4"/></text:p>
            <text:p text:style-name="P2">Is it UNIQUE? How is your product/service <text:span text:style-name="T31">unique, different, or better</text:span>? <text:s/><text:span text:style-name="T32">Our product supports families and makes it easier for everyone to get to their destinations.</text:span></text:p>
            <text:p text:style-name="P16"/>
            <text:p text:style-name="P16">Is it sustainable (5 years +)? <text:span text:style-name="T32">Yes</text:span></text:p>
            <text:p text:style-name="P2">Sustainable Formula:</text:p>
            <text:p text:style-name="P2"><text:s text:c="3"/>Offense <text:span text:style-name="T33">+ Defense</text:span></text:p>
            <text:p text:style-name="P2" loext:marker-style-name="T34">= <text:span text:style-name="T34">Sustainable, Competitive </text:span><text:span text:style-name="T34"/></text:p>
            <text:p text:style-name="P2" loext:marker-style-name="T34"><text:span text:style-name="T34"><text:s text:c="6"/>Advantage = 80% retention for a downward COCA…</text:span></text:p>
            <text:p text:style-name="P2"/>
          </table:table-cell>
          <table:table-cell table:style-name="Table1.A2" table:number-rows-spanned="2" office:value-type="string">
            <text:p text:style-name="P2" loext:marker-style-name="T4"><text:span text:style-name="T4">Who is your Customer(Box1)</text:span><text:span text:style-name="T4"/></text:p>
            <text:p text:style-name="P2">“Inch Wide, Mile Deep </text:p>
            <text:p text:style-name="P2" loext:marker-style-name="T35"><text:span text:style-name="T35">Demographics of End-User:</text:span><text:bookmark text:name="permission-for-group:714961738:everyone"/><text:span text:style-name="T35"/></text:p>
            <text:list text:style-name="L1">
              <text:list-item>
                <text:p text:style-name="P17">Female</text:p>
              </text:list-item>
              <text:list-item>
                <text:p text:style-name="P17">Single</text:p>
              </text:list-item>
              <text:list-item>
                <text:p text:style-name="P18">Mother</text:p>
              </text:list-item>
              <text:list-item>
                <text:p text:style-name="P18">28-58yrs old</text:p>
              </text:list-item>
              <text:list-item>
                <text:p text:style-name="P18">Low-Income</text:p>
              </text:list-item>
            </text:list>
            <text:p text:style-name="P2" loext:marker-style-name="T36"><text:span text:style-name="T36">+ Psychographics </text:span><text:span text:style-name="T36"/></text:p>
            <text:list text:style-name="L2">
              <text:list-item>
                <text:p text:style-name="P19">Shopper</text:p>
              </text:list-item>
              <text:list-item>
                <text:p text:style-name="P19">Likes staying outside</text:p>
              </text:list-item>
              <text:list-item>
                <text:p text:style-name="P19">Likes to travel</text:p>
              </text:list-item>
            </text:list>
            <text:p text:style-name="P2" loext:marker-style-name="T15"><text:span text:style-name="T15">= PERSONA</text:span><text:span text:style-name="T15"/></text:p>
            <text:p text:style-name="P2" loext:marker-style-name="T15"><text:span text:style-name="T15">STEPS: <text:s/>1, 2, 3, 4, 5</text:span><text:span text:style-name="T15"/></text:p>
            <text:p text:style-name="P20" loext:marker-style-name="T37"/>
            <text:p text:style-name="P21" loext:marker-style-name="T12">Who’s the DMU</text:p>
            <text:p text:style-name="P22">Husband (if Married), or self</text:p>
            <text:p text:style-name="P20" loext:marker-style-name="T37"/>
            <text:p text:style-name="P2" loext:marker-style-name="T12"><text:span text:style-name="T15">Customer Discovery</text:span><text:span text:style-name="T12">:</text:span></text:p>
            <text:p text:style-name="P2" loext:marker-style-name="T38"><text:span text:style-name="T38">Proof of concept(Box 1a)</text:span><text:span text:style-name="T38"/></text:p>
            <text:p text:style-name="P20" loext:marker-style-name="T37"/>
            <text:p text:style-name="P2" loext:marker-style-name="T8"><text:span text:style-name="T15">DE Step: 23</text:span><text:span text:style-name="T12"> </text:span><text:span text:style-name="T8">“Show that the Dogs will eat the <text:s/>dog food!</text:span></text:p>
            <text:p text:style-name="P2" loext:marker-style-name="T39"><text:span text:style-name="T39">Primary Market Res.</text:span><text:span text:style-name="T39"/></text:p>
            <text:p text:style-name="P2" loext:marker-style-name="T40"><text:span text:style-name="T40">*10 Interviews per team</text:span><text:span text:style-name="T40"/></text:p>
            <text:p text:style-name="P2" loext:marker-style-name="T40"><text:span text:style-name="T40">*Must match Persona</text:span><text:span text:style-name="T40"/></text:p>
            <text:p text:style-name="P2" loext:marker-style-name="T40"><text:span text:style-name="T40">*Must be strangers</text:span><text:span text:style-name="T40"/></text:p>
            <text:p text:style-name="P2" loext:marker-style-name="T40"><text:span text:style-name="T40">*Conduct via Zoom</text:span><text:span text:style-name="T40"/></text:p>
            <text:p text:style-name="P2" loext:marker-style-name="T40"><text:span text:style-name="T40">80% Positive=Green Light</text:span><text:span text:style-name="T40"/></text:p>
            <text:p text:style-name="P2" loext:marker-style-name="T40"><text:span text:style-name="T40">50%-Neutral=Yellow</text:span><text:span text:style-name="T40"/></text:p>
            <text:p text:style-name="P2" loext:marker-style-name="T40"><text:span text:style-name="T40">20% Red=FAILURE</text:span><text:span text:style-name="T40"/></text:p>
            <text:p text:style-name="P23" loext:marker-style-name="T12"/>
          </table:table-cell>
        </table:table-row>
        <table:table-row table:style-name="Table1.3">
          <table:covered-table-cell table:style-name="Table1.A2"/>
          <table:table-cell table:style-name="Table1.A2" table:number-columns-spanned="2" office:value-type="string">
            <text:p text:style-name="P2" loext:marker-style-name="T3"><text:span text:style-name="T4">KEY RESOURCES</text:span><text:span text:style-name="T3">: (Internal) (BOX 3)</text:span></text:p>
            <text:p text:style-name="P2" loext:marker-style-name="T41"><text:span text:style-name="T41">Your FOUNDING Team </text:span><text:span text:style-name="T41"/></text:p>
            <text:p text:style-name="P2" loext:marker-style-name="T8"><text:span text:style-name="T8">CEO: </text:span><text:span text:style-name="T42">YOU</text:span></text:p>
            <text:p text:style-name="P24" loext:marker-style-name="T8"><text:span text:style-name="T9">CFO: </text:span><text:span text:style-name="T11">Trevon Collins</text:span></text:p>
            <text:p text:style-name="P25" loext:marker-style-name="T8"><text:span text:style-name="T9">CMO: </text:span><text:span text:style-name="T11">Yanira Guevara</text:span></text:p>
            <text:p text:style-name="P25" loext:marker-style-name="T8"><text:span text:style-name="T9">COO/HR: </text:span><text:span text:style-name="T11">Abdullah Julloh</text:span><text:span text:style-name="T9"> CIO/CTO: </text:span><text:span text:style-name="T11">Julissa Contreras</text:span></text:p>
            <text:p text:style-name="P26" loext:marker-style-name="T8">____________________</text:p>
            <text:p text:style-name="P2" loext:marker-style-name="T21"><text:span text:style-name="T18">“Ideal Team Player” by</text:span><text:span text:style-name="T21"> Patrick Lencioni</text:span></text:p>
            <text:list text:style-name="WWNum7">
              <text:list-item>
                <text:p text:style-name="P27" loext:marker-style-name="T8"><text:span text:style-name="T8">Humble</text:span><text:span text:style-name="T8"/></text:p>
              </text:list-item>
              <text:list-item>
                <text:p text:style-name="P27" loext:marker-style-name="T8"><text:span text:style-name="T8">Hungry</text:span><text:span text:style-name="T8"/></text:p>
              </text:list-item>
              <text:list-item>
                <text:p text:style-name="P27" loext:marker-style-name="T8"><text:span text:style-name="T8">Smart (EQ)</text:span><text:span text:style-name="T8"/></text:p>
              </text:list-item>
            </text:list>
            <text:p text:style-name="P2" loext:marker-style-name="T43"><text:span text:style-name="T43">Human Resources (HR)</text:span><text:span text:style-name="T43"/></text:p>
            <text:p text:style-name="P2" loext:marker-style-name="T43"><text:span text:style-name="T43">Other Key Staff Positions</text:span><text:span text:style-name="T43"/></text:p>
            <text:p text:style-name="P24" loext:marker-style-name="T43"><text:span text:style-name="T44">__</text:span><text:span text:style-name="T45">Abdullah Julloh</text:span></text:p>
          </table:table-cell>
          <table:covered-table-cell/>
          <table:covered-table-cell table:style-name="Table1.A2"/>
          <table:table-cell table:style-name="Table1.A2" office:value-type="string">
            <text:p text:style-name="P2" loext:marker-style-name="T3"><text:span text:style-name="T3">Channels/Supply Chain</text:span><text:span text:style-name="T3"/></text:p>
            <text:p text:style-name="P28" loext:marker-style-name="T41"/>
            <text:p text:style-name="P29" loext:marker-style-name="T41"><text:span text:style-name="T41">What is the Sales Process? </text:span><text:span text:style-name="T46">Customer finds website/app → customer signs-up for trial → customer subscribes → custom stays subscribe for convenience.</text:span><text:span text:style-name="T41"><text:line-break/></text:span></text:p>
            <text:p text:style-name="P30" loext:marker-style-name="T41"><text:span text:style-name="T47">How Will Your Customer Acquire your product/service? </text:span><text:span text:style-name="T48">Our landing page, app, and marketing advertisements will put our product in front of people in our marketed areas.</text:span><text:span text:style-name="T47"><text:line-break/></text:span><text:bookmark text:name="permission-for-group:2004769223:everyone"/></text:p>
            <text:p text:style-name="P2"/>
            <text:p text:style-name="P31" loext:marker-style-name="T49"/>
          </table:table-cell>
          <table:covered-table-cell table:style-name="Table1.A2"/>
        </table:table-row>
        <table:table-row table:style-name="Table1.4">
          <table:table-cell table:style-name="Table1.A2" table:number-columns-spanned="2" office:value-type="string">
            <text:p text:style-name="P2" loext:marker-style-name="T4"><text:span text:style-name="T4">COST STRUCTURE</text:span><text:span text:style-name="T4"/></text:p>
            <text:p text:style-name="P32">Overhead: <text:span text:style-name="T50">$15,000</text:span></text:p>
            <text:p text:style-name="P2"><text:span text:style-name="T51">COGS: </text:span><text:span text:style-name="T52">$88,000</text:span><text:span text:style-name="T50"> <text:s/></text:span></text:p>
            <text:p text:style-name="P2">Year-end TOTAL ONLY<text:bookmark text:name="permission-for-group:33896431:everyone"/>: <text:span text:style-name="T52">+$95,000</text:span></text:p>
          </table:table-cell>
          <table:covered-table-cell/>
          <table:table-cell table:style-name="Table1.A2" table:number-columns-spanned="4" office:value-type="string">
            <text:p text:style-name="P2" loext:marker-style-name="T4"><text:span text:style-name="T4">REVENUE STREAMS</text:span><text:span text:style-name="T4"/></text:p>
            <text:p text:style-name="P2">List your TOTAL sources of revenues. Year-End Totals ONLY<text:bookmark text:name="permission-for-group:288234397:everyone"/> <text:span text:style-name="T52">$198,000</text:span></text:p>
            <text:p text:style-name="P24"><text:span text:style-name="T53">How do you make money? </text:span><text:span text:style-name="T54">Rental pricing by hour</text:span></text:p>
            <text:p text:style-name="P24"><text:span text:style-name="T53">What’s your business model? </text:span><text:span text:style-name="T55">Family members access our service and rent the delivered vehicles at rate.</text:span></text:p>
          </table:table-cell>
          <table:covered-table-cell/>
          <table:covered-table-cell/>
          <table:covered-table-cell/>
        </table:table-row>
      </table:table>
      <text:p text:style-name="P33" loext:marker-style-name="T12"><text:span text:style-name="T12">KEY METRICS: DE 20 &amp; 21…What KPI (Key Performance Indicators) numbers will you use to <text:s/>measure your success : e.g., units sold, </text:span><text:span text:style-name="T12"/></text:p>
      <text:p text:style-name="Standard" loext:marker-style-name="T12"><text:span text:style-name="T12">users registered, retaining users, # of paying customers, number of complaints, etc.</text:span><text:span text:style-name="T12"/></text:p>
      <text:p text:style-name="P34" loext:marker-style-name="T56"><text:span text:style-name="T57"><text:s text:c="11"/>POLK: 1-PAGE BLUEPRINT/DE: 24 Steps (AUG2025) Adopted from Disciplined Entrepreneurship: 24 Steps to a SUCCESSFUL STARTUP by Bill Aulet, MIT(2024 v2)</text:span><text:span text:style-name="T5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MIKC I+ Bembo" svg:font-family="'OMIKC I+ Bembo'" style:font-family-generic="roman" style:font-pitch="variable"/>
    <style:font-face style:name="OMIKC I+ Bembo1" svg:font-family="'OMIKC I+ Bembo'" style:font-family-generic="system" style:font-pitch="variable"/>
    <style:font-face style:name="OMIKG I+ Bembo" svg:font-family="'OMIKG I+ Bembo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left" style:justify-single-word="false" fo:orphans="2" fo:widows="2" style:writing-mode="lr-tb"/>
      <style:text-properties fo:color="#365f91" loext:opacity="100%"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089in" fo:orphans="0" fo:widows="0" fo:text-indent="0.0028in" style:auto-text-indent="false"/>
      <style:text-properties style:font-name="Arial" fo:font-family="Arial" style:font-family-generic="swiss" style:font-pitch="variable" fo:font-size="9pt" style:font-name-asian="Arial1" style:font-family-asian="Arial" style:font-family-generic-asian="system" style:font-pitch-asian="variable" style:font-size-asian="9pt" style:font-name-complex="Tahoma1" style:font-family-complex="Tahoma" style:font-family-generic-complex="system" style:font-pitch-complex="variable" style:font-size-complex="9pt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chapter">
      <style:paragraph-properties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000000" loext:opacity="100%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000000" loext:opacity="100%" fo:font-weight="bold" style:font-name-asian="MS Gothic" style:font-family-asian="'MS Gothic'" style:font-family-generic-asian="system" style:font-pitch-asian="variable" style:font-weight-asian="bold" style:font-weight-complex="bold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000000" loext:opacity="100%" fo:font-weight="bold" style:font-name-asian="ＭＳ ゴシック" style:font-family-asian="'ＭＳ ゴシック'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665in" fo:margin-bottom="0.0417in" style:contextual-spacing="false"/>
      <style:text-properties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WWNum5" style:class="chapter">
      <style:paragraph-properties fo:orphans="0" fo:widows="0" fo:keep-with-next="always">
        <style:tab-stops>
          <style:tab-stop style:position="0.5in"/>
        </style:tab-stops>
      </style:paragraph-properties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WWNum4" style:class="chapter">
      <style:paragraph-properties fo:orphans="0" fo:widows="0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Default" style:family="paragraph">
      <style:paragraph-properties fo:margin-top="0in" fo:margin-bottom="0in" style:contextual-spacing="false" fo:line-height="100%" fo:text-align="left" style:justify-single-word="false" fo:orphans="2" fo:widows="2" style:writing-mode="lr-tb"/>
      <style:text-properties fo:color="#000000" loext:opacity="100%" style:font-name="OMIKC I+ Bembo" fo:font-family="'OMIKC I+ Bembo'" style:font-family-generic="roman" style:font-pitch="variable" fo:font-size="12pt" style:font-name-asian="ＭＳ 明朝" style:font-family-asian="'ＭＳ 明朝'" style:font-family-generic-asian="system" style:font-pitch-asian="variable" style:font-size-asian="12pt" style:language-asian="ja" style:country-asian="JP" style:font-name-complex="OMIKC I+ Bembo1" style:font-family-complex="'OMIKC I+ Bembo'" style:font-family-generic-complex="system" style:font-pitch-complex="variable" style:font-size-complex="12pt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ing_20_31" style:display-name="Heading 31" style:family="paragraph" style:parent-style-name="Standard" style:next-style-name="Standard" style:default-outline-level="3" style:list-style-name="">
      <style:paragraph-properties fo:margin-top="0.139in" fo:margin-bottom="0in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weight="bold" style:font-name-asian="MS Gothic" style:font-family-asian="'MS Gothic'" style:font-family-generic-asian="system" style:font-pitch-asian="variable" style:font-weight-asian="bold" style:font-weight-complex="bold"/>
    </style:style>
    <style:style style:name="CM11" style:family="paragraph" style:parent-style-name="Default" style:next-style-name="Default">
      <style:paragraph-properties style:line-height-at-least="0.1807in"/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loext:linked-style-name="Footnote_20_Text_20_Char" style:class="extra"/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left="0in" fo:orphans="2" fo:widows="2" fo:text-indent="0.25in" style:auto-text-indent="false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ppendix_20_Heading" style:display-name="Appendix Heading" style:family="paragraph" style:parent-style-name="Text_20_body" style:default-outline-level="1" style:list-style-name="">
      <style:paragraph-properties fo:margin-left="0in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left" style:justify-single-word="false" fo:orphans="2" fo:widows="2" style:writing-mode="lr-tb"/>
      <style:text-properties style:font-name="Calibri1" fo:font-family="Calibri" style:font-family-generic="swiss" style:font-pitch="variable" fo:language="hr" fo:country="HR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-0.25in" style:auto-text-indent="false"/>
    </style:style>
    <style:style style:name="List_20_1" style:display-name="List 1" style:family="paragraph" style:parent-style-name="Standard" style:list-style-name="WWNum6" style:class="list">
      <style:paragraph-properties fo:margin-top="0in" fo:margin-bottom="0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 fo:text-indent="0.25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WWNum3" style:class="index">
      <style:paragraph-properties fo:margin-left="0in" fo:margin-top="0.1665in" fo:margin-bottom="0in" style:contextual-spacing="false" fo:line-height="108%" fo:keep-together="always" fo:text-indent="0in" style:auto-text-indent="false"/>
      <style:text-properties style:font-name="Cambria" fo:font-family="Cambria" style:font-family-generic="roman" style:font-pitch="variable" fo:font-size="16pt" fo:font-style="italic" fo:font-weight="normal" style:font-name-asian="ＭＳ ゴシック" style:font-family-asian="'ＭＳ ゴシック'" style:font-family-generic-asian="system" style:font-pitch-asian="variable" style:font-size-asian="16pt" style:font-style-asian="italic" style:font-weight-asian="normal" style:font-name-complex="Tahoma1" style:font-family-complex="Tahoma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.0835in" style:contextual-spacing="false"/>
      <style:text-properties fo:text-transform="uppercase" fo:font-size="10pt" fo:font-weight="bold" style:font-size-asian="10pt" style:font-weight-asian="bold" style:font-name-complex="Calibri2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/>
      <style:text-properties fo:font-variant="small-cap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/>
      <style:text-properties fo:font-size="10pt" fo:font-style="italic" style:font-size-asian="10pt" style:font-style-asian="italic" style:font-name-complex="Calibri2" style:font-family-complex="Calibri" style:font-family-generic-complex="system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/>
      <style:text-properties fo:font-size="9pt" style:font-size-asian="9pt" style:font-name-complex="Calibri2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/>
      <style:text-properties fo:font-size="9pt" style:font-size-asian="9pt" style:font-name-complex="Calibri2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/>
      <style:text-properties fo:font-size="9pt" style:font-size-asian="9pt" style:font-name-complex="Calibri2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/>
      <style:text-properties fo:font-size="9pt" style:font-size-asian="9pt" style:font-name-complex="Calibri2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/>
      <style:text-properties fo:font-size="9pt" style:font-size-asian="9pt" style:font-name-complex="Calibri2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/>
      <style:text-properties fo:font-size="9pt" style:font-size-asian="9pt" style:font-name-complex="Calibri2" style:font-family-complex="Calibri" style:font-family-generic-complex="system" style:font-pitch-complex="variable" style:font-size-complex="9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/>
      <style:text-properties style:font-name="Cambria" fo:font-family="Cambria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CM3" style:family="paragraph" style:parent-style-name="Default" style:next-style-name="Default">
      <style:paragraph-properties style:line-height-at-least="0.1807in"/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CM24" style:family="paragraph" style:parent-style-name="Default" style:next-style-name="Default">
      <style:text-properties style:use-window-font-color="true" loext:opacity="0%" style:font-name="OMIKG I+ Bembo" fo:font-family="'OMIKG I+ Bembo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Revision" style:family="paragraph">
      <style:paragraph-properties fo:margin-top="0in" fo:margin-bottom="0in" style:contextual-spacing="false" fo:line-height="100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00000" loext:opacity="100%" style:font-name="Times New Roman" fo:font-family="'Times New Roman'" style:font-family-generic="roman" style:font-pitch="variable"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00000" loext:opacity="100%" style:font-name="Times New Roman" fo:font-family="'Times New Roman'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style-complex="italic" style:font-weight-complex="bold">
        <loext:char-complex-color loext:theme-type="dark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 loext:linked-style-name="Heading_20_6">
      <style:text-properties fo:color="#365f91" loext:opacity="100%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365f91" loext:opacity="100%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04040" loext:opacity="100%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_5f_tgc" style:display-name="_tgc" style:family="text" style:parent-style-name="Default_20_Paragraph_20_Font"/>
    <style:style style:name="Body_20_Text_20_Char" style:display-name="Body Text Char" style:family="text" style:parent-style-name="Default_20_Paragraph_20_Font">
      <style:text-properties style:font-name="Arial" fo:font-family="Arial" style:font-family-generic="swiss" style:font-pitch="variable" fo:font-size="9pt" style:font-name-asian="Arial1" style:font-family-asian="Arial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3_20_Char1" style:display-name="Heading 3 Char1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 loext:linked-style-name="Footnote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font-name-asian="ＭＳ 明朝" style:font-family-asian="'ＭＳ 明朝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ＭＳ 明朝" style:font-family-asian="'ＭＳ 明朝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ＭＳ 明朝" style:font-family-asian="'ＭＳ 明朝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First_20_Indent_20_Char" style:display-name="Body Text First Indent Char" style:family="text" style:parent-style-name="Body_20_Text_20_Char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No_20_Spacing_20_Char" style:display-name="No Spacing Char" style:family="text" loext:linked-style-name="No_20_Spacing">
      <style:text-properties style:font-name="Calibri1" fo:font-family="Calibri" style:font-family-generic="swiss" style:font-pitch="variable" fo:language="hr" fo:country="HR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ps" style:family="text"/>
    <style:style style:name="apple-converted-space" style:family="text" style:parent-style-name="Default_20_Paragraph_20_Font"/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ListLabel_20_1" style:display-name="ListLabel 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2" style:display-name="ListLabel 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family-generic="roman" style:font-pitch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Calibri" fo:font-family="Calibri" style:font-family-generic="roman" style:font-pitch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style:font-name="Calibri" fo:font-family="Calibri" style:font-family-generic="roman" style:font-pitch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="Calibri" fo:font-family="Calibri" style:font-family-generic="roman" style:font-pitch="variable"/>
    </style:style>
    <style:style style:name="ListLabel_20_31" style:display-name="ListLabel 31" style:family="text">
      <style:text-properties style:font-name="Calibri1" fo:font-family="Calibri" style:font-family-generic="swiss" style:font-pitch="variable"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weight="bold" style:font-weight-asian="bold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2.%2%" style:num-prefix="2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" style:num-format="A" style:num-letter-sync="true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I" text:start-value="500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8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73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73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73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73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73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73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73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73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73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1311in" fo:margin-bottom="0.6252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e Atanaskovic</meta:initial-creator>
    <meta:editing-cycles>12</meta:editing-cycles>
    <meta:print-date>2026-03-05T15:13:57.004804300</meta:print-date>
    <meta:creation-date>2025-09-16T01:27:00</meta:creation-date>
    <dc:date>2026-03-17T11:51:53.637256100</dc:date>
    <meta:editing-duration>P7DT7H47M22S</meta:editing-duration>
    <meta:generator>LibreOffice/26.2.0.3$Windows_X86_64 LibreOffice_project/620$Build-3</meta:generator>
    <meta:printed-by>PDF files</meta:printed-by>
    <meta:document-statistic meta:table-count="1" meta:image-count="0" meta:object-count="0" meta:page-count="1" meta:paragraph-count="104" meta:word-count="540" meta:character-count="3561" meta:non-whitespace-character-count="3105"/>
    <meta:user-defined meta:name="AppVersion">16.0000</meta:user-defined>
    <meta:user-defined meta:name="Company">Innovation Fund</meta:user-defined>
    <meta:template xlink:type="simple" xlink:actuate="onRequest" xlink:title="Normal.dotm" xlink:href=""/>
  </office:meta>
</office:document-meta>
</file>