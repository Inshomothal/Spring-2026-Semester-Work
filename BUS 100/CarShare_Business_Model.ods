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Fleet Costs">
        <table:table-row>
          <table:table-cell>
            <text:p>Vehicle Type</text:p>
          </table:table-cell>
          <table:table-cell>
            <text:p>Low Estimate ($)</text:p>
          </table:table-cell>
          <table:table-cell>
            <text:p>High Estimate ($)</text:p>
          </table:table-cell>
          <table:table-cell>
            <text:p>Notes</text:p>
          </table:table-cell>
        </table:table-row>
        <table:table-row>
          <table:table-cell>
            <text:p>Hatchback (8)</text:p>
          </table:table-cell>
          <table:table-cell>
            <text:p>80000</text:p>
          </table:table-cell>
          <table:table-cell>
            <text:p>112000</text:p>
          </table:table-cell>
          <table:table-cell>
            <text:p>10k–14k each</text:p>
          </table:table-cell>
        </table:table-row>
        <table:table-row>
          <table:table-cell>
            <text:p>Sedan (8)</text:p>
          </table:table-cell>
          <table:table-cell>
            <text:p>160000</text:p>
          </table:table-cell>
          <table:table-cell>
            <text:p>224000</text:p>
          </table:table-cell>
          <table:table-cell>
            <text:p>20k–28k each</text:p>
          </table:table-cell>
        </table:table-row>
        <table:table-row>
          <table:table-cell>
            <text:p>EV (4)</text:p>
          </table:table-cell>
          <table:table-cell>
            <text:p>72000</text:p>
          </table:table-cell>
          <table:table-cell>
            <text:p>144000</text:p>
          </table:table-cell>
          <table:table-cell>
            <text:p>18k–36k each</text:p>
          </table:table-cell>
        </table:table-row>
        <table:table-row>
          <table:table-cell>
            <text:p>Readiness per car (20 cars)</text:p>
          </table:table-cell>
          <table:table-cell>
            <text:p>24000</text:p>
          </table:table-cell>
          <table:table-cell>
            <text:p>66000</text:p>
          </table:table-cell>
          <table:table-cell>
            <text:p>1.2k–3.3k each</text:p>
          </table:table-cell>
        </table:table-row>
      </table:table>
      <table:table table:name="Infrastructure">
        <table:table-row>
          <table:table-cell>
            <text:p>Category</text:p>
          </table:table-cell>
          <table:table-cell>
            <text:p>Low Estimate ($)</text:p>
          </table:table-cell>
          <table:table-cell>
            <text:p>High Estimate ($)</text:p>
          </table:table-cell>
        </table:table-row>
        <table:table-row>
          <table:table-cell>
            <text:p>EV Charging (2–4 ports)</text:p>
          </table:table-cell>
          <table:table-cell>
            <text:p>6000</text:p>
          </table:table-cell>
          <table:table-cell>
            <text:p>28000</text:p>
          </table:table-cell>
        </table:table-row>
        <table:table-row>
          <table:table-cell>
            <text:p>Dedicated Parking Setup</text:p>
          </table:table-cell>
          <table:table-cell>
            <text:p>5000</text:p>
          </table:table-cell>
          <table:table-cell>
            <text:p>25000</text:p>
          </table:table-cell>
        </table:table-row>
        <table:table-row>
          <table:table-cell>
            <text:p>Insurance + Reserve (20 cars)</text:p>
          </table:table-cell>
          <table:table-cell>
            <text:p>30000</text:p>
          </table:table-cell>
          <table:table-cell>
            <text:p>120000</text:p>
          </table:table-cell>
        </table:table-row>
        <table:table-row>
          <table:table-cell>
            <text:p>Software/App + Operations</text:p>
          </table:table-cell>
          <table:table-cell>
            <text:p>25000</text:p>
          </table:table-cell>
          <table:table-cell>
            <text:p>150000</text:p>
          </table:table-cell>
        </table:table-row>
      </table:table>
      <table:table table:name="Loan Scenarios">
        <table:table-row>
          <table:table-cell>
            <text:p>Loan Amount ($)</text:p>
          </table:table-cell>
          <table:table-cell>
            <text:p>Interest Rate</text:p>
          </table:table-cell>
          <table:table-cell>
            <text:p>Term (Years)</text:p>
          </table:table-cell>
          <table:table-cell>
            <text:p>Annual Payment ($)</text:p>
          </table:table-cell>
        </table:table-row>
        <table:table-row>
          <table:table-cell>
            <text:p>1000000</text:p>
          </table:table-cell>
          <table:table-cell>
            <text:p>7%</text:p>
          </table:table-cell>
          <table:table-cell>
            <text:p>10</text:p>
          </table:table-cell>
          <table:table-cell>
            <text:p>139000</text:p>
          </table:table-cell>
        </table:table-row>
        <table:table-row>
          <table:table-cell>
            <text:p>1000000</text:p>
          </table:table-cell>
          <table:table-cell>
            <text:p>10%</text:p>
          </table:table-cell>
          <table:table-cell>
            <text:p>7</text:p>
          </table:table-cell>
          <table:table-cell>
            <text:p>199000</text:p>
          </table:table-cell>
        </table:table-row>
        <table:table-row>
          <table:table-cell>
            <text:p>1000000</text:p>
          </table:table-cell>
          <table:table-cell>
            <text:p>12%</text:p>
          </table:table-cell>
          <table:table-cell>
            <text:p>5</text:p>
          </table:table-cell>
          <table:table-cell>
            <text:p>266000</text:p>
          </table:table-cell>
        </table:table-row>
      </table:table>
      <table:table table:name="Utilization Rates">
        <table:table-row>
          <table:table-cell>
            <text:p>Fleet Size</text:p>
          </table:table-cell>
          <table:table-cell>
            <text:p>Hours/Day/Car</text:p>
          </table:table-cell>
          <table:table-cell>
            <text:p>Break-Even Rate (Loan Only $/hr)</text:p>
          </table:table-cell>
          <table:table-cell>
            <text:p>Sustainable Rate Range ($/hr)</text:p>
          </table:table-cell>
        </table:table-row>
        <table:table-row>
          <table:table-cell>
            <text:p>20</text:p>
          </table:table-cell>
          <table:table-cell>
            <text:p>3</text:p>
          </table:table-cell>
          <table:table-cell>
            <text:p>≈12.15</text:p>
          </table:table-cell>
          <table:table-cell>
            <text:p>15–25</text:p>
          </table:table-cell>
        </table:table-row>
        <table:table-row>
          <table:table-cell>
            <text:p>20</text:p>
          </table:table-cell>
          <table:table-cell>
            <text:p>5</text:p>
          </table:table-cell>
          <table:table-cell>
            <text:p>≈7.29</text:p>
          </table:table-cell>
          <table:table-cell>
            <text:p>15–25</text:p>
          </table:table-cell>
        </table:table-row>
        <table:table-row>
          <table:table-cell>
            <text:p>20</text:p>
          </table:table-cell>
          <table:table-cell>
            <text:p>7</text:p>
          </table:table-cell>
          <table:table-cell>
            <text:p>≈2.72</text:p>
          </table:table-cell>
          <table:table-cell>
            <text:p>15–25</text:p>
          </table:table-cell>
        </table:table-row>
        <table:table-row>
          <table:table-cell>
            <text:p>EV Premium</text:p>
          </table:table-cell>
          <table:table-cell>
            <text:p>-</text:p>
          </table:table-cell>
          <table:table-cell>
            <text:p>-</text:p>
          </table:table-cell>
          <table:table-cell>
            <text:p>22–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