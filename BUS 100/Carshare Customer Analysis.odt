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ce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rshare Customer Analysis</text:h>
      <text:h text:style-name="Heading_20_2" text:outline-level="2">Raw Customer Insights</text:h>
      <text:p text:style-name="Standard">Most respondents already own cars but still face reliability issues. Common uses include commuting, visiting family, and general travel.</text:p>
      <text:h text:style-name="Heading_20_2" text:outline-level="2">Pain Points</text:h>
      <text:p text:style-name="Standard">Frequent issues include mechanical failures, poor performance, and inconvenience. Customers are seeking reliable alternatives when their own vehicles fail.</text:p>
      <text:h text:style-name="Heading_20_2" text:outline-level="2">Service Expectations</text:h>
      <text:p text:style-name="Standard">Customers value flexibility, fairness, and systems that balance structure with empathy.</text:p>
      <text:h text:style-name="Heading_20_2" text:outline-level="2">Pricing Insights</text:h>
      <text:p text:style-name="Standard"><text:span text:style-name="T1">W</text:span>illingness to pay averaged around <text:span text:style-name="T1">$125</text:span>, with an ideal target of $120–$150.</text:p>
      <text:h text:style-name="Heading_20_2" text:outline-level="2">Target Market Reframing (Los Angeles)</text:h>
      <text:h text:style-name="Heading_20_3" text:outline-level="3">Single Mothers</text:h>
      <text:p text:style-name="Standard">Need reliable and immediate transportation for childcare, work, and emergencies. Flexibility and speed are critical.</text:p>
      <text:h text:style-name="Heading_20_3" text:outline-level="3">Low-Income Households</text:h>
      <text:p text:style-name="Standard">Require affordable, transparent pricing and short-term vehicle access. Financial accessibility is key.</text:p>
      <text:h text:style-name="Heading_20_3" text:outline-level="3">Apartment Residents</text:h>
      <text:p text:style-name="Standard">Benefit from delivered vehicles due to limited parking. Prefer services that remove storage and security concerns.</text:p>
      <text:h text:style-name="Heading_20_2" text:outline-level="2">Recommended Pricing Strategy</text:h>
      <text:p text:style-name="Standard">Suggested delivery pricing ranges from $50–$100, with a target of $75 to match affordability and encourage repeat usage.</text:p>
      <text:h text:style-name="Heading_20_2" text:outline-level="2">Strategic Insight</text:h>
      <text:p text:style-name="Standard">The service should be positioned as a solution to immediate transportation problems rather than a traditional rental service.</text:p>
      <text:h text:style-name="Heading_20_2" text:outline-level="2">Conclusion</text:h>
      <text:p text:style-name="Standard">The carshare service should focus on affordability, reliability, and convenience for underserved populations in <text:span text:style-name="T1">Watt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3-19T14:39:52.514815800</dc:date>
    <meta:editing-duration>PT2M8S</meta:editing-duration>
    <meta:editing-cycles>1</meta:editing-cycles>
    <meta:document-statistic meta:table-count="0" meta:image-count="0" meta:object-count="0" meta:page-count="1" meta:paragraph-count="22" meta:word-count="186" meta:character-count="1388" meta:non-whitespace-character-count="1226"/>
  </office:meta>
</office:document-meta>
</file>