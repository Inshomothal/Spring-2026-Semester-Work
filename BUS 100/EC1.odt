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kkuratLLWeb" svg:font-family="AkkuratLLWeb, sans-serif"/>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1305e5" officeooo:paragraph-rsid="001305e5"/>
    </style:style>
    <style:style style:name="P2" style:family="paragraph" style:parent-style-name="Text_20_body">
      <style:paragraph-properties fo:line-height="200%"/>
      <style:text-properties officeooo:paragraph-rsid="00143788"/>
    </style:style>
    <style:style style:name="P3" style:family="paragraph" style:parent-style-name="Text_20_body">
      <style:paragraph-properties fo:line-height="200%"/>
      <style:text-properties fo:font-variant="normal" fo:text-transform="none" fo:color="#141414" loext:opacity="100%" style:font-name="AkkuratLLWeb" fo:font-size="12pt" fo:letter-spacing="normal" fo:font-style="normal" fo:font-weight="normal" officeooo:rsid="00143788" officeooo:paragraph-rsid="00143788"/>
    </style:style>
    <style:style style:name="P4" style:family="paragraph" style:parent-style-name="Heading_20_1">
      <style:paragraph-properties fo:break-before="page"/>
      <style:text-properties officeooo:rsid="001305e5" officeooo:paragraph-rsid="001305e5"/>
    </style:style>
    <style:style style:name="P5" style:family="paragraph" style:parent-style-name="Text_20_body">
      <style:text-properties fo:font-variant="normal" fo:text-transform="none" fo:color="#000000" loext:opacity="100%" fo:letter-spacing="normal" officeooo:paragraph-rsid="001305e5"/>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style:style>
    <style:style style:name="P7" style:family="paragraph" style:parent-style-name="Text_20_body">
      <style:text-properties fo:font-variant="normal" fo:text-transform="none" fo:color="#000000" loext:opacity="100%" style:font-name="Calibri" fo:letter-spacing="normal" fo:font-style="normal" fo:font-weight="normal" officeooo:paragraph-rsid="001305e5"/>
    </style:style>
    <style:style style:name="P8" style:family="paragraph" style:parent-style-name="Text_20_body">
      <style:text-properties officeooo:paragraph-rsid="001305e5"/>
    </style:style>
    <style:style style:name="T1" style:family="text">
      <style:text-properties officeooo:rsid="001305e5"/>
    </style:style>
    <style:style style:name="T2" style:family="text">
      <style:text-properties officeooo:rsid="00143788"/>
    </style:style>
    <style:style style:name="T3" style:family="text">
      <style:text-properties fo:font-variant="normal" fo:text-transform="none" fo:color="#141414" loext:opacity="100%" style:font-name="AkkuratLLWeb" fo:font-size="12pt" fo:letter-spacing="normal" fo:font-style="normal" fo:font-weight="normal"/>
    </style:style>
    <style:style style:name="T4" style:family="text">
      <style:text-properties fo:font-variant="normal" fo:text-transform="none" fo:color="#141414" loext:opacity="100%" style:font-name="AkkuratLLWeb" fo:font-size="12pt" fo:letter-spacing="normal" fo:font-style="normal" fo:font-weight="normal" officeooo:rsid="00143788"/>
    </style:style>
    <style:style style:name="T5" style:family="text">
      <style:text-properties style:font-name="Calibri" fo:font-style="normal" fo:font-weight="normal"/>
    </style:style>
    <style:style style:name="T6" style:family="text">
      <style:text-properties style:font-name="Calibri" fo:font-style="italic" fo:font-weight="normal"/>
    </style:style>
    <style:style style:name="T7"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nge Through Business</text:p>
      <text:p text:style-name="P2"><text:span text:style-name="T1"><text:tab/>Every fire starts with a spark, every forest fire from a flame, from the footprints of these fires comes ashes, from the ashes comes new life, from the new life comes a new forest to feed the life inside it. It’s a dramatic and condensed example of how change start small. But even if the change isn’t small, it will make a difference during and after its time. In our current </text:span><text:span text:style-name="T2">societies</text:span><text:span text:style-name="T1">, </text:span><text:span text:style-name="T2">World Economic Forum describes a “</text:span><text:span text:style-name="T3">dichotomy between ‘it’s a business’ </text:span><text:span text:style-name="T4">[and]</text:span><text:span text:style-name="T3"> ‘it’s a charity’” </text:span><text:span text:style-name="T4">and how social entrepreneurship is the innovating change that merges the two together. Our discussion today will focus on the Polk Institute Foundation as one of these businesses made from social entrepreneurship.</text:span></text:p>
      <text:p text:style-name="P3"><text:tab/>The Polk Institute Foundation is a 501(c)(3) non-profit organization that focuses on training individuals to become social entrepreneurs. They utilize a 3 phase progam; Master Level Academy, Mentorship &amp; Training Acceleration, and a Capital Funding program to give entreprenuers the resources they need to make lasting businesses. They focus on the TPL concept which stands for “Triple Bottom Line” and states that the businesses metric shouldn’t just be about success through returns, but also by social outcomes and environmental impact. As per their landing page, they have helped 123 businesses, generated $25M in value, and aim to help 1000 candidates become successful social entrepreneurs by 2032. They support all kinds of people even though they do mention a focus on Black &amp; Brown because of the resources typically available to them.</text:p>
      <text:p text:style-name="P3"><text:tab/>From the Polk Insitute Foundation, we can see the kind of focused involved with businesses made by social entrepreneurs. They make money not for the sake of making money, but to also change the society around them through the social outcomes of their work and the environment they influence.</text:p>
      <text:h text:style-name="P4" text:outline-level="1">References</text:h>
      <text:p text:style-name="P5">“<text:span text:style-name="T5">Polk Institute Foundation - People. Planet. Profit.” </text:span><text:span text:style-name="T6">Polkinstitute.org</text:span><text:span text:style-name="T5">, 2026, polkinstitute.org/. Accessed 2 Mar. 2026.</text:span></text:p>
      <text:p text:style-name="P6">‌</text:p>
      <text:p text:style-name="P7">Milligan, Katherine, and Hilde Schwab. “Explainer: What Is a Social Entrepreneur?” <text:span text:style-name="T7">World Economic Forum</text:span>, 18 Dec. 2015, www.weforum.org/stories/2015/12/explainer-what-is-a-social-entrepreneur/?utm_source=chatgpt.com. Accessed 2 Mar. 2026.</text:p>
      <text:p text:style-name="P6">‌</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kkuratLLWeb" svg:font-family="AkkuratLLWeb, sans-serif"/>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1T17:32:06.063346600</meta:creation-date>
    <dc:date>2026-03-01T17:59:50.158900800</dc:date>
    <meta:editing-duration>PT40S</meta:editing-duration>
    <meta:editing-cycles>1</meta:editing-cycles>
    <meta:document-statistic meta:table-count="0" meta:image-count="0" meta:object-count="0" meta:page-count="2" meta:paragraph-count="9" meta:word-count="340" meta:character-count="2225" meta:non-whitespace-character-count="1891"/>
    <meta:generator>LibreOffice/26.2.0.3$Windows_X86_64 LibreOffice_project/620$Build-3</meta:generator>
  </office:meta>
</office:document-meta>
</file>